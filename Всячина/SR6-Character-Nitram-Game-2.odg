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pitch="variable"/>
    <style:font-face style:name="Liberation Sans1" svg:font-family="'Liberation Sans'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0.80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5.089cm" fo:min-width="7.94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241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643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113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1cm" fo:min-width="0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5cm" fo:min-width="0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in-height="0.314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in-height="0.46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10.48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2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231f2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3" style:family="text">
      <style:text-properties fo:color="#231f20" loext:opacity="100%" style:font-name="Arial Black1" fo:font-size="7.19999980926514pt" fo:font-weight="normal" style:font-name-asian="Arial Black1" style:font-size-asian="7.19999980926514pt" style:font-weight-asian="normal" style:font-name-complex="Arial Black1" style:font-size-complex="7.19999980926514pt" style:font-weight-complex="normal"/>
    </style:style>
    <style:style style:name="T4" style:family="text">
      <style:text-properties fo:color="#94096a" loext:opacity="100%" style:font-name="DejaVu Sans" fo:font-size="13pt" fo:font-weight="normal" style:font-name-asian="DejaVu Sans" style:font-size-asian="13pt" style:font-weight-asian="normal" style:font-name-complex="DejaVu Sans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color="#000000" loext:opacity="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1" fo:font-size="7pt" fo:font-weight="normal" style:font-name-asian="Liberation Sans1" style:font-size-asian="7pt" style:font-weight-asian="normal" style:font-name-complex="Liberation Sans1" style:font-size-complex="7pt" style:font-weight-complex="normal"/>
    </style:style>
    <style:style style:name="T19" style:family="text">
      <style:text-properties fo:color="#918f8f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24" style:family="text">
      <style:text-properties fo:color="#94096a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5.72cm" svg:y="13.078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5.831cm" svg:y="13.325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5.816cm" svg:y="14.008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5.702cm" svg:y="14.326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5.728cm" svg:y="14.643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5.635cm" svg:y="14.961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2" draw:text-style-name="P4" draw:layer="layout" svg:width="0.48cm" svg:height="0.319cm" svg:x="3.049cm" svg:y="8.441cm">
          <draw:text-box>
            <text:p text:style-name="P3"><text:span text:style-name="T12">4+2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3" draw:text-style-name="P4" draw:layer="layout" svg:width="0.802cm" svg:height="0.637cm" svg:x="3.049cm" svg:y="10.27cm">
          <draw:text-box>
            <text:p text:style-name="P3"><text:span text:style-name="T12">1+2=3</text:span></text:p>
            <text:p text:style-name="P3"><text:span text:style-name="T12"/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4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5" draw:text-style-name="P4" draw:layer="layout" svg:width="7.946cm" svg:height="5.089cm" svg:x="1.304cm" svg:y="14cm">
          <draw:text-box>
            <text:p text:style-name="P3"><text:span text:style-name="T14">Пилотирование </text:span><text:span text:style-name="T12">6 </text:span></text:p>
            <text:p text:style-name="P3"><text:span text:style-name="T12">(+2 эксперт наземный, +1 мастер), </text:span></text:p>
            <text:p text:style-name="P3"><text:span text:style-name="T14">Электроника </text:span><text:span text:style-name="T12">3, </text:span></text:p>
            <text:p text:style-name="P3"><text:span text:style-name="T14">Инженерное дело </text:span><text:span text:style-name="T12">4 (+2 эксперт автомеханик) 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/text:p>
            <text:p text:style-name="P3"><text:span text:style-name="T14">ориентирование </text:span><text:span text:style-name="T12">5, </text:span></text:p>
            <text:p text:style-name="P3"><text:span text:style-name="T14">Атлетика </text:span><text:span text:style-name="T12">3, </text:span></text:p>
            <text:p text:style-name="P3"><text:span text:style-name="T14">Внимание </text:span><text:span text:style-name="T12">2, </text:span></text:p>
            <text:p text:style-name="P3"><text:span text:style-name="T12"><text:s/></text:span><text:span text:style-name="T14">Убеждение </text:span><text:span text:style-name="T12">2, </text:span></text:p>
            <text:p text:style-name="P3"><text:span text:style-name="T12">Английский 4,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Экспертные знания: Обряды нативных племён, </text:span></text:p>
            <text:p text:style-name="P3"><text:span text:style-name="T12">Тягачи Вольво</text:span></text:p>
            <text:p text:style-name="P3"><text:span text:style-name="T12">Инструменты D-walt (Жёлтенькие)</text:span></text:p>
          </draw:text-box>
        </draw:frame>
        <draw:frame draw:style-name="gr96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7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8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9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100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1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2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2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2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2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1" draw:text-style-name="P2" draw:layer="layout" svg:width="0.6cm" svg:height="0.601cm" svg:x="14.463cm" svg:y="9.628cm" svg:viewBox="0 0 601 602" draw:points="0,602 601,602 601,0 0,0">
          <text:p/>
        </draw:polygon>
        <draw:frame draw:style-name="gr102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1" draw:text-style-name="P2" draw:layer="layout" svg:width="0.601cm" svg:height="0.601cm" svg:x="11.969cm" svg:y="10.846cm" svg:viewBox="0 0 602 602" draw:points="0,602 602,602 602,0 0,0">
          <text:p/>
        </draw:polygon>
        <draw:frame draw:style-name="gr102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2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2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2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1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1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1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1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1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1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1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1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2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2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2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1" draw:text-style-name="P2" draw:layer="layout" svg:width="0.601cm" svg:height="0.601cm" svg:x="16.46cm" svg:y="9.609cm" svg:viewBox="0 0 602 602" draw:points="0,602 602,602 602,0 0,0">
          <text:p/>
        </draw:polygon>
        <draw:frame draw:style-name="gr102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1" draw:text-style-name="P2" draw:layer="layout" svg:width="0.602cm" svg:height="0.601cm" svg:x="17.754cm" svg:y="9.609cm" svg:viewBox="0 0 603 602" draw:points="0,602 603,602 603,0 0,0">
          <text:p/>
        </draw:polygon>
        <draw:frame draw:style-name="gr102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2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2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2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1" draw:text-style-name="P2" draw:layer="layout" svg:width="0.601cm" svg:height="0.6cm" svg:x="19.067cm" svg:y="10.942cm" svg:viewBox="0 0 602 601" draw:points="0,601 602,601 602,0 0,0">
          <text:p/>
        </draw:polygon>
        <draw:frame draw:style-name="gr102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1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1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1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1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1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1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1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1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1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1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1" draw:text-style-name="P2" draw:layer="layout" svg:width="0.294cm" svg:height="0.304cm" svg:x="5.106cm" svg:y="11.191cm" svg:viewBox="0 0 295 305" draw:points="0,305 295,305 295,0 0,0">
          <text:p/>
        </draw:polygon>
        <draw:frame draw:style-name="gr102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3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4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5" draw:text-style-name="P16" draw:layer="layout" svg:width="3.241cm" svg:height="0.399cm" svg:x="14.983cm" svg:y="0.851cm">
          <draw:text-box>
            <text:p><text:span text:style-name="T16">Такода Часка (Боров)</text:span></text:p>
          </draw:text-box>
        </draw:frame>
        <draw:frame draw:style-name="gr106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7" draw:text-style-name="P16" draw:layer="layout" svg:width="0.599cm" svg:height="0.5cm" svg:x="4.901cm" svg:y="5.5cm">
          <draw:text-box>
            <text:p><text:span text:style-name="T16">109</text:span></text:p>
          </draw:text-box>
        </draw:frame>
        <draw:frame draw:style-name="gr108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Эксперт -5, Эксперт -5, Мастер -5,</text:span></text:p>
            <text:p text:style-name="P3"><text:span text:style-name="T18"/></text:p>
            <text:p text:style-name="P3"><text:span text:style-name="T18">Остаток 1 кармы.</text:span></text:p>
          </draw:text-box>
        </draw:frame>
        <draw:frame draw:style-name="gr109" draw:text-style-name="P16" draw:layer="layout" svg:width="0.599cm" svg:height="0.779cm" svg:x="2.5cm" svg:y="5.5cm">
          <draw:text-box>
            <text:p><text:span text:style-name="T16">10</text:span></text:p>
          </draw:text-box>
        </draw:frame>
        <draw:frame draw:style-name="gr107" draw:text-style-name="P16" draw:layer="layout" svg:width="2.06cm" svg:height="0.5cm" svg:x="7.94cm" svg:y="7cm">
          <draw:text-box>
            <text:p><text:span text:style-name="T16">0.6+1.7 = 2.3</text:span></text:p>
          </draw:text-box>
        </draw:frame>
        <draw:frame draw:style-name="gr110" draw:text-style-name="P16" draw:layer="layout" svg:width="3.909cm" svg:height="0.399cm" svg:x="2.5cm" svg:y="23.25cm">
          <draw:text-box>
            <text:p><text:span text:style-name="T16">Остаток: 16 439 без прож.</text:span></text:p>
          </draw:text-box>
        </draw:frame>
        <draw:frame draw:style-name="gr111" draw:text-style-name="P16" draw:layer="layout" svg:width="2.25cm" svg:height="0.5cm" svg:x="8cm" svg:y="8cm">
          <draw:text-box>
            <text:p><text:span text:style-name="T16">4+3=7</text:span></text:p>
          </draw:text-box>
        </draw:frame>
        <draw:frame draw:style-name="gr111" draw:text-style-name="P16" draw:layer="layout" svg:width="1cm" svg:height="0.5cm" svg:x="8cm" svg:y="10.25cm">
          <draw:text-box>
            <text:p><text:span text:style-name="T16">3+3=6</text:span></text:p>
          </draw:text-box>
        </draw:frame>
        <draw:frame draw:style-name="gr112" draw:text-style-name="P16" draw:layer="layout" svg:width="2cm" svg:height="0.39cm" svg:x="8cm" svg:y="11.11cm">
          <draw:text-box>
            <text:p><text:span text:style-name="T16">5/10/15+d6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13" draw:text-style-name="P20" draw:layer="layout" svg:width="9.249cm" svg:height="7.749cm" svg:x="0.75cm" svg:y="18cm" svg:viewBox="0 0 9250 7750" draw:points="0,0 9250,0 925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  <text:p><text:span text:style-name="T16">Книга по инженер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</text:span></text:p>
          <text:p><text:span text:style-name="T16">Ford Intercepto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2000</text:span></text:p>
          <text:p><text:span text:style-name="T16">+ящик сгухи -1 банка</text:span></text:p>
          <text:p><text:span text:style-name="T16">Боевой деловой костюм</text:span></text:p>
          <text:p><text:span text:style-name="T16"/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14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5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6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7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8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9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20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21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22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23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24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5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6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7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8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9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30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24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5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7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31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32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33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34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5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6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34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7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8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9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40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30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41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42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43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44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43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30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43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5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6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7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8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8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8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8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8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8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8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8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8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1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1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1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1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1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1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1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1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1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1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1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1" draw:text-style-name="P2" draw:layer="layout" svg:width="0.347cm" svg:height="0.347cm" svg:x="19.869cm" svg:y="10.489cm" svg:viewBox="0 0 348 348" draw:points="0,348 348,348 348,0 0,0">
          <text:p/>
        </draw:polygon>
        <draw:frame draw:style-name="gr149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50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51" draw:text-style-name="P21" draw:layer="layout" svg:width="9.25cm" svg:height="2.201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  <text:p><text:span text:style-name="T20">Арес лайф фаер </text:span><text:span text:style-name="T20"><text:tab/></text:span><text:span text:style-name="T20"><text:tab/></text:span><text:span text:style-name="T20">30 патронов</text:span><text:span text:style-name="T20"><text:tab/></text:span><text:span text:style-name="T20"><text:tab/></text:span><text:span text:style-name="T20">2 физ 10/7/6/-/-</text:span></text:p>
          </draw:text-box>
        </draw:frame>
        <draw:frame draw:style-name="gr152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53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54" draw:text-style-name="P16" draw:layer="layout" svg:width="9.5cm" svg:height="2.335cm" svg:x="1cm" svg:y="13cm">
          <draw:text-box>
            <text:p><text:span text:style-name="T16">Замена мускулов</text:span><text:span text:style-name="T16"><text:tab/></text:span><text:span text:style-name="T16">2 +2 к Силе и Проворству</text:span><text:span text:style-name="T16"><text:tab/></text:span><text:span text:style-name="T16"> 60000</text:span></text:p>
            <text:p><text:span text:style-name="T16">Модуль контроля</text:span><text:span text:style-name="T16"><text:tab/></text:span><text:span text:style-name="T16">2 - 2 к сложности вождения +2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8"/></text:span><text:span text:style-name="T16"><text:tab/></text:span><text:span text:style-name="T16"><text:tab/></text:span><text:span text:style-name="T16">60000</text:span></text:p>
          </draw:text-box>
        </draw:frame>
        <draw:frame draw:style-name="gr155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6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  <draw:frame draw:style-name="gr157" draw:text-style-name="P17" draw:layer="layout" svg:width="0.75cm" svg:height="0.314cm" svg:x="9.25cm" svg:y="4.5cm">
          <draw:text-box>
            <text:p><text:span text:style-name="T17">3 физ</text:span></text:p>
          </draw:text-box>
        </draw:frame>
        <draw:frame draw:style-name="gr157" draw:text-style-name="P17" draw:layer="layout" svg:width="0.75cm" svg:height="0.314cm" svg:x="9.25cm" svg:y="5cm">
          <draw:text-box>
            <text:p><text:span text:style-name="T17">4 физ</text:span></text:p>
          </draw:text-box>
        </draw:frame>
        <draw:frame draw:style-name="gr157" draw:text-style-name="P17" draw:layer="layout" svg:width="0.75cm" svg:height="0.314cm" svg:x="9.25cm" svg:y="5.5cm">
          <draw:text-box>
            <text:p><text:span text:style-name="T17">5 физ</text:span></text:p>
          </draw:text-box>
        </draw:frame>
        <draw:frame draw:style-name="gr157" draw:text-style-name="P17" draw:layer="layout" svg:width="1.25cm" svg:height="0.314cm" svg:x="8.95cm" svg:y="4.75cm">
          <draw:text-box>
            <text:p><text:span text:style-name="T17">10/10/8/-/-</text:span></text:p>
          </draw:text-box>
        </draw:frame>
        <draw:frame draw:style-name="gr158" draw:text-style-name="P17" draw:layer="layout" svg:width="1.5cm" svg:height="0.464cm" svg:x="8.95cm" svg:y="5.286cm">
          <draw:text-box>
            <text:p><text:span text:style-name="T17">3/12/8/-/-</text:span></text:p>
          </draw:text-box>
        </draw:frame>
        <draw:frame draw:style-name="gr157" draw:text-style-name="P17" draw:layer="layout" svg:width="1.75cm" svg:height="0.314cm" svg:x="9cm" svg:y="5.75cm">
          <draw:text-box>
            <text:p><text:span text:style-name="T17">2/7/10/12/21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9" draw:text-style-name="P24" draw:layer="layout" svg:width="10.48cm" svg:height="12.376cm" svg:x="0.25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</text:span></text:p>
            <text:p><text:span text:style-name="T22"><text:s/></text:span><text:span text:style-name="T22">однако то 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</text:span></text:p>
            <text:p><text:span text:style-name="T22">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</text:span></text:p>
            <text:p><text:span text:style-name="T22">и устроить терракт под прикрытием техногенной катастрофы? </text:span></text:p>
            <text:p><text:span text:style-name="T22">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60" draw:text-style-name="P17" draw:layer="layout" svg:width="9.25cm" svg:height="3.75cm" svg:x="0.25cm" svg:y="4.25cm">
          <draw:text-box>
            <text:p><text:span text:style-name="T17">Грех 1: Дальнобой Узумети Колберт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Эйрики Шайерн, коренной американец. 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6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61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6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pitch="variable"/>
    <style:font-face style:name="Liberation Sans1" svg:font-family="'Liberation Sans'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Arial Unicode M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2H50M58S</meta:editing-duration>
    <meta:editing-cycles>93</meta:editing-cycles>
    <meta:generator>LibreOffice/7.6.4.1$Windows_X86_64 LibreOffice_project/e19e193f88cd6c0525a17fb7a176ed8e6a3e2aa1</meta:generator>
    <meta:creation-date>2026-03-20T12:12:21.36</meta:creation-date>
    <dc:date>2026-06-13T11:22:15.201000000</dc:date>
    <meta:print-date>2026-03-28T12:36:51.198000000</meta:print-date>
    <meta:printed-by>Файлы PDF</meta:printed-by>
    <meta:document-statistic meta:object-count="556"/>
  </office:meta>
</office:document-meta>
</file>