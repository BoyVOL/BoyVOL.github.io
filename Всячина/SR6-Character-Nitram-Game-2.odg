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4600000CBF6B973AD3.jpg" manifest:media-type="image/jpeg"/>
  <manifest:file-entry manifest:full-path="Pictures/10000001000005C400000152400CF442.png" manifest:media-type="image/png"/>
  <manifest:file-entry manifest:full-path="Pictures/100000010000059800000103CFA8136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Bahnschrift" svg:font-family="Bahnschrift"/>
    <style:font-face style:name="Bahnschrift1" svg:font-family="Bahnschrift" style:font-pitch="variable"/>
    <style:font-face style:name="DejaVu Sans" svg:font-family="'DejaVu Sans'"/>
    <style:font-face style:name="DejaVu Sans1" svg:font-family="'DejaVu Sans'" style:font-pitch="variable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6cm" svg:stroke-color="#94096a" draw:stroke-linejoin="miter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6cm" svg:stroke-color="#656263" draw:stroke-linejoin="miter" svg:stroke-linecap="butt" draw:fill="none" fo:padding-top="0.008cm" fo:padding-bottom="0.008cm" fo:padding-left="0.008cm" fo:padding-right="0.008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solid" svg:stroke-width="0.025cm" svg:stroke-color="#94096a" draw:stroke-linejoin="miter" svg:stroke-linecap="butt" draw:fill="none" fo:padding-top="0.012cm" fo:padding-bottom="0.012cm" fo:padding-left="0.012cm" fo:padding-right="0.012cm" loext:decorative="false"/>
    </style:style>
    <style:style style:name="gr79" style:family="graphic" style:parent-style-name="standard">
      <style:graphic-properties draw:stroke="solid" svg:stroke-width="0.034cm" svg:stroke-color="#94096a" draw:stroke-linejoin="miter" svg:stroke-linecap="butt" draw:fill="none" fo:padding-top="0.017cm" fo:padding-bottom="0.017cm" fo:padding-left="0.017cm" fo:padding-right="0.017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34cm" svg:stroke-color="#b2b1b1" draw:stroke-linejoin="miter" svg:stroke-linecap="butt" draw:fill="none" fo:padding-top="0.017cm" fo:padding-bottom="0.017cm" fo:padding-left="0.017cm" fo:padding-right="0.017cm" loext:decorative="false"/>
    </style:style>
    <style:style style:name="gr82" style:family="graphic" style:parent-style-name="standard">
      <style:graphic-properties draw:stroke="none" draw:fill="solid" draw:fill-color="#b2b1b1" loext:decorative="fals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solid" svg:stroke-width="0.016cm" svg:stroke-color="#94096a" draw:stroke-linejoin="miter" svg:stroke-linecap="butt" draw:fill="solid" draw:fill-color="#ffffff" fo:padding-top="0.008cm" fo:padding-bottom="0.008cm" fo:padding-left="0.008cm" fo:padding-right="0.008cm" loext:decorative="false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37cm" fo:min-width="0.802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5.089cm" fo:min-width="7.94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017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241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5cm" fo:min-width="9.396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7cm" fo:min-width="0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909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in-height="0.39cm" loext:decorative="false"/>
      <style:paragraph-properties style:writing-mode="lr-tb"/>
    </style:style>
    <style:style style:name="gr113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1cm" fo:min-width="0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9.336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8.463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5cm" fo:min-width="0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7.141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463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in-height="0.314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in-height="0.464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76cm" fo:min-width="10.48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fill-color="#ffffff" fo:min-height="0.5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solid" draw:fill-color="#b2b1b1"/>
    </style:style>
    <style:style style:name="P13" style:family="paragraph">
      <loext:graphic-properties draw:fill="none"/>
      <style:text-properties style:font-name="Times New Roman1" fo:font-size="8pt" style:font-size-asian="8pt" style:font-size-complex="8pt"/>
    </style:style>
    <style:style style:name="P14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5" style:family="paragraph">
      <loext:graphic-properties draw:fill="none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="none"/>
      <style:paragraph-properties loext:tab-stop-distance="0cm">
        <style:tab-stops>
          <style:tab-stop style:position="1.402cm"/>
        </style:tab-stops>
      </style:paragraph-properties>
    </style:style>
    <style:style style:name="P20" style:family="paragraph">
      <loext:graphic-properties draw:fill="solid" draw:fill-color="#ffffff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text-properties fo:font-size="11pt" style:font-size-asian="11pt" style:font-size-complex="11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6pt" style:font-size-asian="10pt" style:font-size-complex="10pt"/>
    </style:style>
    <style:style style:name="T1" style:family="text">
      <style:text-properties fo:color="#231f20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2" style:family="text">
      <style:text-properties fo:color="#231f20" loext:opacity="100%" style:font-name="DejaVu Sans" fo:font-size="6pt" fo:font-weight="normal" style:font-name-asian="DejaVu Sans" style:font-size-asian="6pt" style:font-weight-asian="normal" style:font-name-complex="DejaVu Sans" style:font-size-complex="6pt" style:font-weight-complex="normal"/>
    </style:style>
    <style:style style:name="T3" style:family="text">
      <style:text-properties fo:color="#231f20" loext:opacity="100%" style:font-name="Arial Black1" fo:font-size="7.19999980926514pt" fo:font-weight="normal" style:font-name-asian="Arial Black1" style:font-size-asian="7.19999980926514pt" style:font-weight-asian="normal" style:font-name-complex="Arial Black1" style:font-size-complex="7.19999980926514pt" style:font-weight-complex="normal"/>
    </style:style>
    <style:style style:name="T4" style:family="text">
      <style:text-properties fo:color="#94096a" loext:opacity="100%" style:font-name="DejaVu Sans" fo:font-size="13pt" fo:font-weight="normal" style:font-name-asian="DejaVu Sans" style:font-size-asian="13pt" style:font-weight-asian="normal" style:font-name-complex="DejaVu Sans" style:font-size-complex="13pt" style:font-weight-complex="normal"/>
    </style:style>
    <style:style style:name="T5" style:family="text">
      <style:text-properties fo:color="#231f20" loext:opacity="100%" style:font-name="Bahnschrift" fo:font-size="7pt" fo:font-weight="normal" style:font-name-asian="Bahnschrift" style:font-size-asian="7pt" style:font-weight-asian="normal" style:font-name-complex="Bahnschrift" style:font-size-complex="7pt" style:font-weight-complex="normal"/>
    </style:style>
    <style:style style:name="T6" style:family="text">
      <style:text-properties fo:color="#231f20" loext:opacity="100%" style:font-name="Bahnschrift" fo:font-size="6pt" fo:font-weight="normal" style:font-name-asian="Bahnschrift" style:font-size-asian="6pt" style:font-weight-asian="normal" style:font-name-complex="Bahnschrift" style:font-size-complex="6pt" style:font-weight-complex="normal"/>
    </style:style>
    <style:style style:name="T7" style:family="text">
      <style:text-properties fo:color="#231f20" loext:opacity="100%" style:font-name="Bahnschrift" fo:font-size="9pt" fo:font-weight="normal" style:font-name-asian="Bahnschrift" style:font-size-asian="9pt" style:font-weight-asian="normal" style:font-name-complex="Bahnschrift" style:font-size-complex="9pt" style:font-weight-complex="normal"/>
    </style:style>
    <style:style style:name="T8" style:family="text">
      <style:text-properties fo:color="#94096a" loext:opacity="100%" style:font-name="Bahnschrift" fo:font-size="7pt" fo:font-weight="normal" style:font-name-asian="Bahnschrift" style:font-size-asian="7pt" style:font-weight-asian="normal" style:font-name-complex="Bahnschrift" style:font-size-complex="7pt" style:font-weight-complex="normal"/>
    </style:style>
    <style:style style:name="T9" style:family="text">
      <style:text-properties fo:color="#231f20" loext:opacity="100%" style:font-name="DejaVu Serif Condensed1" fo:font-size="6pt" fo:font-weight="normal" style:font-name-asian="DejaVu Serif Condensed1" style:font-size-asian="6pt" style:font-weight-asian="normal" style:font-name-complex="DejaVu Serif Condensed1" style:font-size-complex="6pt" style:font-weight-complex="normal"/>
    </style:style>
    <style:style style:name="T10" style:family="text">
      <style:text-properties fo:color="#231f20" loext:opacity="100%" style:font-name="DejaVu Serif Condensed1" fo:font-size="7pt" fo:font-weight="normal" style:font-name-asian="DejaVu Serif Condensed1" style:font-size-asian="7pt" style:font-weight-asian="normal" style:font-name-complex="DejaVu Serif Condensed1" style:font-size-complex="7pt" style:font-weight-complex="normal"/>
    </style:style>
    <style:style style:name="T11" style:family="text">
      <style:text-properties fo:color="#4f4c4d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2" style:family="text">
      <style:text-properties fo:color="#000000" loext:opacity="100%" style:font-name="Liberation Sans" fo:font-size="8pt" fo:font-weight="normal" style:font-name-asian="Liberation Sans" style:font-size-asian="8pt" style:font-weight-asian="normal" style:font-name-complex="Liberation Sans" style:font-size-complex="8pt" style:font-weight-complex="normal"/>
    </style:style>
    <style:style style:name="T13" style:family="text">
      <style:text-properties fo:color="#000000" loext:opacity="100%" style:font-name="Times New Roman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4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15" style:family="text">
      <style:text-properties fo:color="#000000" loext:opacity="100%" style:font-name="Liberation Serif1" fo:font-size="24pt" fo:font-weight="normal" style:font-name-asian="Liberation Serif1" style:font-size-asian="24pt" style:font-weight-asian="normal" style:font-name-complex="Liberation Serif1" style:font-size-complex="24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00000" loext:opacity="100%" style:font-name="Liberation Sans" fo:font-size="7pt" fo:font-weight="normal" style:font-name-asian="Liberation Sans" style:font-size-asian="7pt" style:font-weight-asian="normal" style:font-name-complex="Liberation Sans" style:font-size-complex="7pt" style:font-weight-complex="normal"/>
    </style:style>
    <style:style style:name="T19" style:family="text">
      <style:text-properties fo:color="#918f8f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color="#94096a" loext:opacity="100%" style:font-name="DejaVu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T24" style:family="text">
      <style:text-properties fo:color="#94096a" loext:opacity="100%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6.986cm" svg:x="0cm" svg:y="0cm" svg:viewBox="0 0 21590 26987" draw:points="0,0 21590,0 21590,26987 0,26987">
          <text:p/>
        </draw:polygon>
        <draw:frame draw:style-name="gr2" draw:text-style-name="P2" draw:layer="layout" svg:width="22.265cm" svg:height="27.625cm" svg:x="-0.265cm" svg:y="-0.375cm">
          <draw:image xlink:href="Pictures/1000000000000A4600000CBF6B973AD3.jpg" xlink:type="simple" xlink:show="embed" xlink:actuate="onLoad" draw:mime-type="image/jpeg">
            <text:p/>
          </draw:image>
        </draw:frame>
        <draw:frame draw:style-name="gr3" draw:text-style-name="P4" draw:layer="layout" svg:width="16.089cm" svg:height="0.331cm" svg:x="12.92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5" draw:text-style-name="P4" draw:layer="layout" svg:width="17.037cm" svg:height="0.331cm" svg:x="12.92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7" draw:layer="layout" svg:width="3.863cm" svg:height="0.53cm" svg:x="11.527cm" svg:y="3.174cm">
          <draw:text-box>
            <text:p text:style-name="P3"><text:span text:style-name="T4">core combat info</text:span></text:p>
          </draw:text-box>
        </draw:frame>
        <draw:path draw:style-name="gr7" draw:text-style-name="P2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7" draw:layer="layout" svg:width="4.036cm" svg:height="0.53cm" svg:x="11.527cm" svg:y="6.817cm">
          <draw:text-box>
            <text:p text:style-name="P3"><text:span text:style-name="T4">condition monitor</text:span></text:p>
          </draw:text-box>
        </draw:frame>
        <draw:path draw:style-name="gr7" draw:text-style-name="P2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7" draw:layer="layout" svg:width="1.937cm" svg:height="0.53cm" svg:x="11.527cm" svg:y="16.876cm">
          <draw:text-box>
            <text:p text:style-name="P3"><text:span text:style-name="T4">qualities</text:span></text:p>
          </draw:text-box>
        </draw:frame>
        <draw:path draw:style-name="gr7" draw:text-style-name="P2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7" draw:layer="layout" svg:width="1.941cm" svg:height="0.53cm" svg:x="11.527cm" svg:y="22.251cm">
          <draw:text-box>
            <text:p text:style-name="P3"><text:span text:style-name="T4">contacts</text:span></text:p>
          </draw:text-box>
        </draw:frame>
        <draw:path draw:style-name="gr7" draw:text-style-name="P2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7" draw:layer="layout" svg:width="3.143cm" svg:height="0.53cm" svg:x="1.12cm" svg:y="3.174cm">
          <draw:text-box>
            <text:p text:style-name="P3"><text:span text:style-name="T4">personal data</text:span></text:p>
          </draw:text-box>
        </draw:frame>
        <draw:path draw:style-name="gr7" draw:text-style-name="P2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7" draw:layer="layout" svg:width="2.225cm" svg:height="0.53cm" svg:x="1.12cm" svg:y="6.566cm">
          <draw:text-box>
            <text:p text:style-name="P3"><text:span text:style-name="T4">attributes</text:span></text:p>
          </draw:text-box>
        </draw:frame>
        <draw:path draw:style-name="gr7" draw:text-style-name="P2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text-style-name="P2" draw:layer="layout" svg:x1="10.072cm" svg:y1="4.079cm" svg:x2="1.55cm" svg:y2="4.079cm">
          <text:p/>
        </draw:line>
        <draw:line draw:style-name="gr15" draw:text-style-name="P2" draw:layer="layout" svg:x1="20.186cm" svg:y1="17.756cm" svg:x2="11.369cm" svg:y2="17.756cm">
          <text:p/>
        </draw:line>
        <draw:line draw:style-name="gr15" draw:text-style-name="P2" draw:layer="layout" svg:x1="2.747cm" svg:y1="7.448cm" svg:x2="1.408cm" svg:y2="7.448cm">
          <text:p/>
        </draw:line>
        <draw:line draw:style-name="gr15" draw:text-style-name="P2" draw:layer="layout" svg:x1="7.524cm" svg:y1="7.448cm" svg:x2="5.654cm" svg:y2="7.448cm">
          <text:p/>
        </draw:line>
        <draw:line draw:style-name="gr15" draw:text-style-name="P2" draw:layer="layout" svg:x1="5.345cm" svg:y1="7.448cm" svg:x2="3.013cm" svg:y2="7.448cm">
          <text:p/>
        </draw:line>
        <draw:line draw:style-name="gr15" draw:text-style-name="P2" draw:layer="layout" svg:x1="10.209cm" svg:y1="7.448cm" svg:x2="7.761cm" svg:y2="7.448cm">
          <text:p/>
        </draw:line>
        <draw:line draw:style-name="gr15" draw:text-style-name="P2" draw:layer="layout" svg:x1="10.209cm" svg:y1="7.906cm" svg:x2="7.761cm" svg:y2="7.906cm">
          <text:p/>
        </draw:line>
        <draw:line draw:style-name="gr15" draw:text-style-name="P2" draw:layer="layout" svg:x1="10.122cm" svg:y1="23.17cm" svg:x2="1.55cm" svg:y2="23.17cm">
          <text:p/>
        </draw:line>
        <draw:line draw:style-name="gr15" draw:text-style-name="P2" draw:layer="layout" svg:x1="11.554cm" svg:y1="4.079cm" svg:x2="20.075cm" svg:y2="4.079cm">
          <text:p/>
        </draw:line>
        <draw:line draw:style-name="gr15" draw:text-style-name="P2" draw:layer="layout" svg:x1="10.072cm" svg:y1="4.536cm" svg:x2="1.55cm" svg:y2="4.536cm">
          <text:p/>
        </draw:line>
        <draw:line draw:style-name="gr15" draw:text-style-name="P2" draw:layer="layout" svg:x1="2.747cm" svg:y1="7.906cm" svg:x2="1.408cm" svg:y2="7.906cm">
          <text:p/>
        </draw:line>
        <draw:line draw:style-name="gr15" draw:text-style-name="P2" draw:layer="layout" svg:x1="7.524cm" svg:y1="7.906cm" svg:x2="5.654cm" svg:y2="7.906cm">
          <text:p/>
        </draw:line>
        <draw:line draw:style-name="gr15" draw:text-style-name="P2" draw:layer="layout" svg:x1="5.345cm" svg:y1="7.906cm" svg:x2="3.013cm" svg:y2="7.906cm">
          <text:p/>
        </draw:line>
        <draw:line draw:style-name="gr15" draw:text-style-name="P2" draw:layer="layout" svg:x1="10.122cm" svg:y1="23.628cm" svg:x2="1.55cm" svg:y2="23.628cm">
          <text:p/>
        </draw:line>
        <draw:line draw:style-name="gr15" draw:text-style-name="P2" draw:layer="layout" svg:x1="11.554cm" svg:y1="4.536cm" svg:x2="20.075cm" svg:y2="4.536cm">
          <text:p/>
        </draw:line>
        <draw:line draw:style-name="gr15" draw:text-style-name="P2" draw:layer="layout" svg:x1="10.072cm" svg:y1="4.993cm" svg:x2="1.55cm" svg:y2="4.993cm">
          <text:p/>
        </draw:line>
        <draw:line draw:style-name="gr15" draw:text-style-name="P2" draw:layer="layout" svg:x1="2.747cm" svg:y1="8.363cm" svg:x2="1.408cm" svg:y2="8.363cm">
          <text:p/>
        </draw:line>
        <draw:line draw:style-name="gr15" draw:text-style-name="P2" draw:layer="layout" svg:x1="7.524cm" svg:y1="8.363cm" svg:x2="5.654cm" svg:y2="8.363cm">
          <text:p/>
        </draw:line>
        <draw:line draw:style-name="gr15" draw:text-style-name="P2" draw:layer="layout" svg:x1="5.345cm" svg:y1="8.363cm" svg:x2="3.013cm" svg:y2="8.363cm">
          <text:p/>
        </draw:line>
        <draw:line draw:style-name="gr15" draw:text-style-name="P2" draw:layer="layout" svg:x1="10.209cm" svg:y1="8.363cm" svg:x2="7.761cm" svg:y2="8.363cm">
          <text:p/>
        </draw:line>
        <draw:line draw:style-name="gr15" draw:text-style-name="P2" draw:layer="layout" svg:x1="10.122cm" svg:y1="24.085cm" svg:x2="1.55cm" svg:y2="24.085cm">
          <text:p/>
        </draw:line>
        <draw:line draw:style-name="gr15" draw:text-style-name="P2" draw:layer="layout" svg:x1="10.072cm" svg:y1="5.45cm" svg:x2="1.55cm" svg:y2="5.45cm">
          <text:p/>
        </draw:line>
        <draw:line draw:style-name="gr15" draw:text-style-name="P2" draw:layer="layout" svg:x1="2.747cm" svg:y1="8.82cm" svg:x2="1.408cm" svg:y2="8.82cm">
          <text:p/>
        </draw:line>
        <draw:line draw:style-name="gr15" draw:text-style-name="P2" draw:layer="layout" svg:x1="7.524cm" svg:y1="8.82cm" svg:x2="5.654cm" svg:y2="8.82cm">
          <text:p/>
        </draw:line>
        <draw:line draw:style-name="gr15" draw:text-style-name="P2" draw:layer="layout" svg:x1="5.345cm" svg:y1="8.82cm" svg:x2="3.013cm" svg:y2="8.82cm">
          <text:p/>
        </draw:line>
        <draw:line draw:style-name="gr15" draw:text-style-name="P2" draw:layer="layout" svg:x1="10.209cm" svg:y1="8.82cm" svg:x2="7.761cm" svg:y2="8.82cm">
          <text:p/>
        </draw:line>
        <draw:line draw:style-name="gr15" draw:text-style-name="P2" draw:layer="layout" svg:x1="10.122cm" svg:y1="24.542cm" svg:x2="1.55cm" svg:y2="24.542cm">
          <text:p/>
        </draw:line>
        <draw:line draw:style-name="gr15" draw:text-style-name="P2" draw:layer="layout" svg:x1="11.554cm" svg:y1="5.539cm" svg:x2="20.075cm" svg:y2="5.539cm">
          <text:p/>
        </draw:line>
        <draw:line draw:style-name="gr15" draw:text-style-name="P2" draw:layer="layout" svg:x1="10.072cm" svg:y1="5.908cm" svg:x2="1.55cm" svg:y2="5.908cm">
          <text:p/>
        </draw:line>
        <draw:line draw:style-name="gr15" draw:text-style-name="P2" draw:layer="layout" svg:x1="2.747cm" svg:y1="9.277cm" svg:x2="1.408cm" svg:y2="9.277cm">
          <text:p/>
        </draw:line>
        <draw:line draw:style-name="gr15" draw:text-style-name="P2" draw:layer="layout" svg:x1="7.524cm" svg:y1="9.277cm" svg:x2="5.654cm" svg:y2="9.277cm">
          <text:p/>
        </draw:line>
        <draw:line draw:style-name="gr15" draw:text-style-name="P2" draw:layer="layout" svg:x1="5.345cm" svg:y1="9.277cm" svg:x2="3.013cm" svg:y2="9.277cm">
          <text:p/>
        </draw:line>
        <draw:line draw:style-name="gr15" draw:text-style-name="P2" draw:layer="layout" svg:x1="10.209cm" svg:y1="9.277cm" svg:x2="7.761cm" svg:y2="9.277cm">
          <text:p/>
        </draw:line>
        <draw:line draw:style-name="gr15" draw:text-style-name="P2" draw:layer="layout" svg:x1="2.747cm" svg:y1="9.734cm" svg:x2="1.408cm" svg:y2="9.734cm">
          <text:p/>
        </draw:line>
        <draw:line draw:style-name="gr15" draw:text-style-name="P2" draw:layer="layout" svg:x1="7.524cm" svg:y1="9.734cm" svg:x2="5.654cm" svg:y2="9.734cm">
          <text:p/>
        </draw:line>
        <draw:line draw:style-name="gr15" draw:text-style-name="P2" draw:layer="layout" svg:x1="5.345cm" svg:y1="9.734cm" svg:x2="3.013cm" svg:y2="9.734cm">
          <text:p/>
        </draw:line>
        <draw:line draw:style-name="gr15" draw:text-style-name="P2" draw:layer="layout" svg:x1="10.209cm" svg:y1="9.734cm" svg:x2="7.761cm" svg:y2="9.734cm">
          <text:p/>
        </draw:line>
        <draw:line draw:style-name="gr15" draw:text-style-name="P2" draw:layer="layout" svg:x1="2.747cm" svg:y1="10.191cm" svg:x2="1.408cm" svg:y2="10.191cm">
          <text:p/>
        </draw:line>
        <draw:line draw:style-name="gr15" draw:text-style-name="P2" draw:layer="layout" svg:x1="2.747cm" svg:y1="11.086cm" svg:x2="1.408cm" svg:y2="11.086cm">
          <text:p/>
        </draw:line>
        <draw:line draw:style-name="gr15" draw:text-style-name="P2" draw:layer="layout" svg:x1="2.747cm" svg:y1="11.972cm" svg:x2="1.408cm" svg:y2="11.972cm">
          <text:p/>
        </draw:line>
        <draw:line draw:style-name="gr15" draw:text-style-name="P2" draw:layer="layout" svg:x1="7.524cm" svg:y1="10.191cm" svg:x2="5.654cm" svg:y2="10.191cm">
          <text:p/>
        </draw:line>
        <draw:line draw:style-name="gr15" draw:text-style-name="P2" draw:layer="layout" svg:x1="7.524cm" svg:y1="11.086cm" svg:x2="5.654cm" svg:y2="11.086cm">
          <text:p/>
        </draw:line>
        <draw:line draw:style-name="gr15" draw:text-style-name="P2" draw:layer="layout" svg:x1="7.524cm" svg:y1="11.972cm" svg:x2="5.654cm" svg:y2="11.972cm">
          <text:p/>
        </draw:line>
        <draw:line draw:style-name="gr15" draw:text-style-name="P2" draw:layer="layout" svg:x1="5.345cm" svg:y1="10.191cm" svg:x2="3.013cm" svg:y2="10.191cm">
          <text:p/>
        </draw:line>
        <draw:line draw:style-name="gr15" draw:text-style-name="P2" draw:layer="layout" svg:x1="5.345cm" svg:y1="11.086cm" svg:x2="3.013cm" svg:y2="11.086cm">
          <text:p/>
        </draw:line>
        <draw:line draw:style-name="gr15" draw:text-style-name="P2" draw:layer="layout" svg:x1="5.345cm" svg:y1="11.972cm" svg:x2="3.013cm" svg:y2="11.972cm">
          <text:p/>
        </draw:line>
        <draw:line draw:style-name="gr15" draw:text-style-name="P2" draw:layer="layout" svg:x1="10.209cm" svg:y1="10.191cm" svg:x2="7.761cm" svg:y2="10.191cm">
          <text:p/>
        </draw:line>
        <draw:line draw:style-name="gr15" draw:text-style-name="P2" draw:layer="layout" svg:x1="10.209cm" svg:y1="11.086cm" svg:x2="7.761cm" svg:y2="11.086cm">
          <text:p/>
        </draw:line>
        <draw:line draw:style-name="gr15" draw:text-style-name="P2" draw:layer="layout" svg:x1="10.209cm" svg:y1="11.972cm" svg:x2="7.761cm" svg:y2="11.972cm">
          <text:p/>
        </draw:line>
        <draw:line draw:style-name="gr15" draw:text-style-name="P2" draw:layer="layout" svg:x1="2.747cm" svg:y1="10.649cm" svg:x2="1.408cm" svg:y2="10.649cm">
          <text:p/>
        </draw:line>
        <draw:line draw:style-name="gr15" draw:text-style-name="P2" draw:layer="layout" svg:x1="2.747cm" svg:y1="11.544cm" svg:x2="1.408cm" svg:y2="11.544cm">
          <text:p/>
        </draw:line>
        <draw:line draw:style-name="gr15" draw:text-style-name="P2" draw:layer="layout" svg:x1="7.524cm" svg:y1="10.649cm" svg:x2="5.654cm" svg:y2="10.649cm">
          <text:p/>
        </draw:line>
        <draw:line draw:style-name="gr15" draw:text-style-name="P2" draw:layer="layout" svg:x1="7.524cm" svg:y1="11.544cm" svg:x2="5.654cm" svg:y2="11.544cm">
          <text:p/>
        </draw:line>
        <draw:line draw:style-name="gr15" draw:text-style-name="P2" draw:layer="layout" svg:x1="5.345cm" svg:y1="10.649cm" svg:x2="3.013cm" svg:y2="10.649cm">
          <text:p/>
        </draw:line>
        <draw:line draw:style-name="gr15" draw:text-style-name="P2" draw:layer="layout" svg:x1="10.209cm" svg:y1="10.649cm" svg:x2="7.761cm" svg:y2="10.649cm">
          <text:p/>
        </draw:line>
        <draw:line draw:style-name="gr15" draw:text-style-name="P2" draw:layer="layout" svg:x1="10.209cm" svg:y1="11.544cm" svg:x2="7.761cm" svg:y2="11.544cm">
          <text:p/>
        </draw:line>
        <draw:line draw:style-name="gr15" draw:text-style-name="P2" draw:layer="layout" svg:x1="10.122cm" svg:y1="24.999cm" svg:x2="1.55cm" svg:y2="24.999cm">
          <text:p/>
        </draw:line>
        <draw:line draw:style-name="gr15" draw:text-style-name="P2" draw:layer="layout" svg:x1="10.122cm" svg:y1="25.468cm" svg:x2="1.55cm" svg:y2="25.468cm">
          <text:p/>
        </draw:line>
        <draw:frame draw:style-name="gr16" draw:text-style-name="P7" draw:layer="layout" svg:width="1.124cm" svg:height="0.53cm" svg:x="1.12cm" svg:y="12.81cm">
          <draw:text-box>
            <text:p text:style-name="P3"><text:span text:style-name="T4">skills</text:span></text:p>
          </draw:text-box>
        </draw:frame>
        <draw:frame draw:style-name="gr17" draw:text-style-name="P7" draw:layer="layout" svg:width="6.746cm" svg:height="0.53cm" svg:x="1.12cm" svg:y="22.251cm">
          <draw:text-box>
            <text:p text:style-name="P3"><text:span text:style-name="T4">IDs / LIFESTYLES / CURRENCY</text:span></text:p>
          </draw:text-box>
        </draw:frame>
        <draw:frame draw:style-name="gr18" draw:text-style-name="P8" draw:layer="layout" svg:width="2.534cm" svg:height="0.298cm" svg:x="1.551cm" svg:y="3.794cm">
          <draw:text-box>
            <text:p text:style-name="P3"><text:span text:style-name="T5">NAME/PRIMARY ALIAS</text:span></text:p>
          </draw:text-box>
        </draw:frame>
        <draw:frame draw:style-name="gr19" draw:text-style-name="P5" draw:layer="layout" svg:width="0.713cm" svg:height="0.255cm" svg:x="11.371cm" svg:y="17.478cm">
          <draw:text-box>
            <text:p text:style-name="P3"><text:span text:style-name="T6">Quality </text:span></text:p>
          </draw:text-box>
        </draw:frame>
        <draw:frame draw:style-name="gr20" draw:text-style-name="P5" draw:layer="layout" svg:width="0.612cm" svg:height="0.255cm" svg:x="16.349cm" svg:y="17.478cm">
          <draw:text-box>
            <text:p text:style-name="P3"><text:span text:style-name="T6">Notes </text:span></text:p>
          </draw:text-box>
        </draw:frame>
        <draw:frame draw:style-name="gr21" draw:text-style-name="P5" draw:layer="layout" svg:width="0.434cm" svg:height="0.255cm" svg:x="19.695cm" svg:y="17.478cm">
          <draw:text-box>
            <text:p text:style-name="P3"><text:span text:style-name="T6">Type</text:span></text:p>
          </draw:text-box>
        </draw:frame>
        <draw:frame draw:style-name="gr22" draw:text-style-name="P9" draw:layer="layout" svg:width="3.304cm" svg:height="0.383cm" svg:x="12.197cm" svg:y="7.387cm">
          <draw:text-box>
            <text:p text:style-name="P3"><text:span text:style-name="T7">Physical Damage Track</text:span></text:p>
          </draw:text-box>
        </draw:frame>
        <draw:frame draw:style-name="gr23" draw:text-style-name="P9" draw:layer="layout" svg:width="2.762cm" svg:height="0.383cm" svg:x="17.011cm" svg:y="7.387cm">
          <draw:text-box>
            <text:p text:style-name="P3"><text:span text:style-name="T7">Stun Damage Track</text:span></text:p>
          </draw:text-box>
        </draw:frame>
        <draw:frame draw:style-name="gr24" draw:text-style-name="P8" draw:layer="layout" svg:width="0.544cm" svg:height="0.298cm" svg:x="2.236cm" svg:y="7.164cm">
          <draw:text-box>
            <text:p text:style-name="P3"><text:span text:style-name="T8">Body</text:span></text:p>
          </draw:text-box>
        </draw:frame>
        <draw:frame draw:style-name="gr25" draw:text-style-name="P10" draw:layer="layout" svg:width="0.925cm" svg:height="0.298cm" svg:x="6.768cm" svg:y="7.164cm">
          <draw:text-box>
            <text:p text:style-name="P3"><text:span text:style-name="T5">Essence</text:span></text:p>
          </draw:text-box>
        </draw:frame>
        <draw:frame draw:style-name="gr26" draw:text-style-name="P5" draw:layer="layout" svg:width="5.433cm" svg:height="0.247cm" svg:x="11.718cm" svg:y="15.648cm">
          <draw:text-box>
            <text:p text:style-name="P3"><text:span text:style-name="T9">Characters have 8 + (Body ÷ 2, round up) boxes on the </text:span></text:p>
          </draw:text-box>
        </draw:frame>
        <draw:frame draw:style-name="gr27" draw:text-style-name="P5" draw:layer="layout" svg:width="4.43cm" svg:height="0.247cm" svg:x="12.001cm" svg:y="15.895cm">
          <draw:text-box>
            <text:p text:style-name="P3"><text:span text:style-name="T9">physical damage track; black out extra boxes.</text:span></text:p>
          </draw:text-box>
        </draw:frame>
        <draw:frame draw:style-name="gr28" draw:text-style-name="P5" draw:layer="layout" svg:width="5.01cm" svg:height="0.247cm" svg:x="15.72cm" svg:y="13.078cm">
          <draw:text-box>
            <text:p text:style-name="P3"><text:span text:style-name="T9">Characters have 8 + (Will ÷ 2, round up) boxes on <text:s/></text:span></text:p>
          </draw:text-box>
        </draw:frame>
        <draw:frame draw:style-name="gr29" draw:text-style-name="P5" draw:layer="layout" svg:width="4.434cm" svg:height="0.247cm" svg:x="15.831cm" svg:y="13.325cm">
          <draw:text-box>
            <text:p text:style-name="P3"><text:span text:style-name="T9">the stun damage track; black out extra boxes.</text:span></text:p>
          </draw:text-box>
        </draw:frame>
        <draw:frame draw:style-name="gr30" draw:text-style-name="P8" draw:layer="layout" svg:width="0.692cm" svg:height="0.298cm" svg:x="2.108cm" svg:y="7.62cm">
          <draw:text-box>
            <text:p text:style-name="P3"><text:span text:style-name="T8">Agility</text:span></text:p>
          </draw:text-box>
        </draw:frame>
        <draw:frame draw:style-name="gr31" draw:text-style-name="P8" draw:layer="layout" svg:width="1.945cm" svg:height="0.298cm" svg:x="5.918cm" svg:y="7.62cm">
          <draw:text-box>
            <text:p text:style-name="P3"><text:span text:style-name="T5">Magic/Resonance</text:span></text:p>
          </draw:text-box>
        </draw:frame>
        <draw:frame draw:style-name="gr32" draw:text-style-name="P8" draw:layer="layout" svg:width="0.963cm" svg:height="0.298cm" svg:x="1.908cm" svg:y="8.077cm">
          <draw:text-box>
            <text:p text:style-name="P3"><text:span text:style-name="T8">Reaction</text:span></text:p>
          </draw:text-box>
        </draw:frame>
        <draw:frame draw:style-name="gr33" draw:text-style-name="P8" draw:layer="layout" svg:width="0.942cm" svg:height="0.298cm" svg:x="6.651cm" svg:y="8.077cm">
          <draw:text-box>
            <text:p text:style-name="P3"><text:span text:style-name="T8">Initiative</text:span></text:p>
          </draw:text-box>
        </draw:frame>
        <draw:frame draw:style-name="gr34" draw:text-style-name="P8" draw:layer="layout" svg:width="0.955cm" svg:height="0.298cm" svg:x="1.916cm" svg:y="8.534cm">
          <draw:text-box>
            <text:p text:style-name="P3"><text:span text:style-name="T8">Strength</text:span></text:p>
          </draw:text-box>
        </draw:frame>
        <draw:frame draw:style-name="gr35" draw:text-style-name="P8" draw:layer="layout" svg:width="1.708cm" svg:height="0.298cm" svg:x="6.072cm" svg:y="8.534cm">
          <draw:text-box>
            <text:p text:style-name="P3"><text:span text:style-name="T8">Matrix Initiative</text:span></text:p>
          </draw:text-box>
        </draw:frame>
        <draw:frame draw:style-name="gr36" draw:text-style-name="P8" draw:layer="layout" svg:width="1.115cm" svg:height="0.298cm" svg:x="1.79cm" svg:y="8.99cm">
          <draw:text-box>
            <text:p text:style-name="P3"><text:span text:style-name="T5">Willpower</text:span></text:p>
          </draw:text-box>
        </draw:frame>
        <draw:frame draw:style-name="gr37" draw:text-style-name="P8" draw:layer="layout" svg:width="1.687cm" svg:height="0.298cm" svg:x="6.085cm" svg:y="8.99cm">
          <draw:text-box>
            <text:p text:style-name="P3"><text:span text:style-name="T8">Astral Initiative</text:span></text:p>
          </draw:text-box>
        </draw:frame>
        <draw:frame draw:style-name="gr38" draw:text-style-name="P8" draw:layer="layout" svg:width="0.595cm" svg:height="0.298cm" svg:x="2.23cm" svg:y="9.447cm">
          <draw:text-box>
            <text:p text:style-name="P3"><text:span text:style-name="T5">Logic</text:span></text:p>
          </draw:text-box>
        </draw:frame>
        <draw:frame draw:style-name="gr39" draw:text-style-name="P8" draw:layer="layout" svg:width="1.272cm" svg:height="0.298cm" svg:x="6.476cm" svg:y="9.447cm">
          <draw:text-box>
            <text:p text:style-name="P3"><text:span text:style-name="T5">Composure</text:span></text:p>
          </draw:text-box>
        </draw:frame>
        <draw:frame draw:style-name="gr40" draw:text-style-name="P8" draw:layer="layout" svg:width="0.899cm" svg:height="0.298cm" svg:x="1.908cm" svg:y="9.903cm">
          <draw:text-box>
            <text:p text:style-name="P3"><text:span text:style-name="T5">Intuition</text:span></text:p>
          </draw:text-box>
        </draw:frame>
        <draw:frame draw:style-name="gr24" draw:text-style-name="P8" draw:layer="layout" svg:width="0.544cm" svg:height="0.298cm" svg:x="2.259cm" svg:y="10.798cm">
          <draw:text-box>
            <text:p text:style-name="P3"><text:span text:style-name="T5">Edge</text:span></text:p>
          </draw:text-box>
        </draw:frame>
        <draw:frame draw:style-name="gr41" draw:text-style-name="P8" draw:layer="layout" svg:width="1.399cm" svg:height="0.298cm" svg:x="1.584cm" svg:y="11.684cm">
          <draw:text-box>
            <text:p text:style-name="P3"><text:span text:style-name="T5">Unarmed AR</text:span></text:p>
          </draw:text-box>
        </draw:frame>
        <draw:frame draw:style-name="gr42" draw:text-style-name="P8" draw:layer="layout" svg:width="1.814cm" svg:height="0.298cm" svg:x="5.999cm" svg:y="9.903cm">
          <draw:text-box>
            <text:p text:style-name="P3"><text:span text:style-name="T5">Judge Intentions</text:span></text:p>
          </draw:text-box>
        </draw:frame>
        <draw:frame draw:style-name="gr43" draw:text-style-name="P8" draw:layer="layout" svg:width="1.069cm" svg:height="0.298cm" svg:x="6.58cm" svg:y="10.798cm">
          <draw:text-box>
            <text:p text:style-name="P3"><text:span text:style-name="T5">Lift/Carry</text:span></text:p>
          </draw:text-box>
        </draw:frame>
        <draw:frame draw:style-name="gr44" draw:text-style-name="P8" draw:layer="layout" svg:width="1.666cm" svg:height="0.298cm" svg:x="6.138cm" svg:y="11.684cm">
          <draw:text-box>
            <text:p text:style-name="P3"><text:span text:style-name="T5">Defense Rating</text:span></text:p>
          </draw:text-box>
        </draw:frame>
        <draw:frame draw:style-name="gr45" draw:text-style-name="P8" draw:layer="layout" svg:width="1.06cm" svg:height="0.298cm" svg:x="1.855cm" svg:y="10.36cm">
          <draw:text-box>
            <text:p text:style-name="P3"><text:span text:style-name="T5">Charisma</text:span></text:p>
          </draw:text-box>
        </draw:frame>
        <draw:frame draw:style-name="gr46" draw:text-style-name="P8" draw:layer="layout" svg:width="1.306cm" svg:height="0.298cm" svg:x="1.661cm" svg:y="11.255cm">
          <draw:text-box>
            <text:p text:style-name="P3"><text:span text:style-name="T5">Edge Points</text:span></text:p>
          </draw:text-box>
        </draw:frame>
        <draw:frame draw:style-name="gr47" draw:text-style-name="P8" draw:layer="layout" svg:width="0.895cm" svg:height="0.298cm" svg:x="6.727cm" svg:y="10.36cm">
          <draw:text-box>
            <text:p text:style-name="P3"><text:span text:style-name="T5">Memory</text:span></text:p>
          </draw:text-box>
        </draw:frame>
        <draw:frame draw:style-name="gr48" draw:text-style-name="P8" draw:layer="layout" svg:width="1.141cm" svg:height="0.298cm" svg:x="6.531cm" svg:y="11.255cm">
          <draw:text-box>
            <text:p text:style-name="P3"><text:span text:style-name="T5">Movement</text:span></text:p>
          </draw:text-box>
        </draw:frame>
        <draw:frame draw:style-name="gr49" draw:text-style-name="P8" draw:layer="layout" svg:width="1.899cm" svg:height="0.298cm" svg:x="1.551cm" svg:y="22.887cm">
          <draw:text-box>
            <text:p text:style-name="P3"><text:span text:style-name="T5">Primary Lifestyle</text:span></text:p>
          </draw:text-box>
        </draw:frame>
        <draw:frame draw:style-name="gr50" draw:text-style-name="P8" draw:layer="layout" svg:width="1.678cm" svg:height="0.298cm" svg:x="11.555cm" svg:y="3.795cm">
          <draw:text-box>
            <text:p text:style-name="P3"><text:span text:style-name="T5">Primary Armor</text:span></text:p>
          </draw:text-box>
        </draw:frame>
        <draw:frame draw:style-name="gr51" draw:text-style-name="P8" draw:layer="layout" svg:width="2.724cm" svg:height="0.298cm" svg:x="11.555cm" svg:y="4.252cm">
          <draw:text-box>
            <text:p text:style-name="P3"><text:span text:style-name="T5">Primary Ranged Weapon</text:span></text:p>
          </draw:text-box>
        </draw:frame>
        <draw:frame draw:style-name="gr52" draw:text-style-name="P8" draw:layer="layout" svg:width="2.559cm" svg:height="0.298cm" svg:x="11.555cm" svg:y="5.255cm">
          <draw:text-box>
            <text:p text:style-name="P3"><text:span text:style-name="T5">Primary Melee Weapon</text:span></text:p>
          </draw:text-box>
        </draw:frame>
        <draw:frame draw:style-name="gr53" draw:text-style-name="P5" draw:layer="layout" svg:width="0.641cm" svg:height="0.247cm" svg:x="17.717cm" svg:y="3.807cm">
          <draw:text-box>
            <text:p text:style-name="P3"><text:span text:style-name="T9">Rating</text:span></text:p>
          </draw:text-box>
        </draw:frame>
        <draw:frame draw:style-name="gr54" draw:text-style-name="P8" draw:layer="layout" svg:width="1.001cm" svg:height="0.298cm" svg:x="1.551cm" svg:y="4.251cm">
          <draw:text-box>
            <text:p text:style-name="P3"><text:span text:style-name="T5">Metatype</text:span></text:p>
          </draw:text-box>
        </draw:frame>
        <draw:frame draw:style-name="gr55" draw:text-style-name="P8" draw:layer="layout" svg:width="0.696cm" svg:height="0.298cm" svg:x="1.551cm" svg:y="23.342cm">
          <draw:text-box>
            <text:p text:style-name="P3"><text:span text:style-name="T5">Nuyen</text:span></text:p>
          </draw:text-box>
        </draw:frame>
        <draw:frame draw:style-name="gr56" draw:text-style-name="P8" draw:layer="layout" svg:width="0.425cm" svg:height="0.298cm" svg:x="1.551cm" svg:y="4.683cm">
          <draw:text-box>
            <text:p text:style-name="P3"><text:span text:style-name="T5">Age</text:span></text:p>
          </draw:text-box>
        </draw:frame>
        <draw:frame draw:style-name="gr57" draw:text-style-name="P8" draw:layer="layout" svg:width="5.256cm" svg:height="0.298cm" svg:x="1.551cm" svg:y="23.774cm">
          <draw:text-box>
            <text:p text:style-name="P3"><text:span text:style-name="T5">Fake IDs / Related Lifestyles / Funds / Licenses</text:span></text:p>
          </draw:text-box>
        </draw:frame>
        <draw:frame draw:style-name="gr58" draw:text-style-name="P8" draw:layer="layout" svg:width="1.192cm" svg:height="0.298cm" svg:x="1.551cm" svg:y="5.14cm">
          <draw:text-box>
            <text:p text:style-name="P3"><text:span text:style-name="T5">Reputation</text:span></text:p>
          </draw:text-box>
        </draw:frame>
        <draw:frame draw:style-name="gr59" draw:text-style-name="P8" draw:layer="layout" svg:width="0.739cm" svg:height="0.298cm" svg:x="1.551cm" svg:y="5.597cm">
          <draw:text-box>
            <text:p text:style-name="P3"><text:span text:style-name="T5">Karma</text:span></text:p>
          </draw:text-box>
        </draw:frame>
        <draw:frame draw:style-name="gr60" draw:text-style-name="P8" draw:layer="layout" svg:width="1.344cm" svg:height="0.298cm" svg:x="3.487cm" svg:y="5.597cm">
          <draw:text-box>
            <text:p text:style-name="P3"><text:span text:style-name="T5">Total Karma</text:span></text:p>
          </draw:text-box>
        </draw:frame>
        <draw:frame draw:style-name="gr61" draw:text-style-name="P8" draw:layer="layout" svg:width="0.506cm" svg:height="0.298cm" svg:x="6.382cm" svg:y="5.597cm">
          <draw:text-box>
            <text:p text:style-name="P3"><text:span text:style-name="T5">Misc</text:span></text:p>
          </draw:text-box>
        </draw:frame>
        <draw:frame draw:style-name="gr62" draw:text-style-name="P8" draw:layer="layout" svg:width="0.51cm" svg:height="0.298cm" svg:x="5.429cm" svg:y="5.14cm">
          <draw:text-box>
            <text:p text:style-name="P3"><text:span text:style-name="T5">Heat</text:span></text:p>
          </draw:text-box>
        </draw:frame>
        <draw:frame draw:style-name="gr63" draw:text-style-name="P8" draw:layer="layout" svg:width="0.413cm" svg:height="0.298cm" svg:x="3.487cm" svg:y="4.683cm">
          <draw:text-box>
            <text:p text:style-name="P3"><text:span text:style-name="T5">Sex</text:span></text:p>
          </draw:text-box>
        </draw:frame>
        <draw:frame draw:style-name="gr64" draw:text-style-name="P8" draw:layer="layout" svg:width="0.709cm" svg:height="0.298cm" svg:x="5.429cm" svg:y="4.683cm">
          <draw:text-box>
            <text:p text:style-name="P3"><text:span text:style-name="T5">Height</text:span></text:p>
          </draw:text-box>
        </draw:frame>
        <draw:frame draw:style-name="gr65" draw:text-style-name="P8" draw:layer="layout" svg:width="0.751cm" svg:height="0.298cm" svg:x="7.536cm" svg:y="4.683cm">
          <draw:text-box>
            <text:p text:style-name="P3"><text:span text:style-name="T5">Weight</text:span></text:p>
          </draw:text-box>
        </draw:frame>
        <draw:frame draw:style-name="gr66" draw:text-style-name="P8" draw:layer="layout" svg:width="0.95cm" svg:height="0.298cm" svg:x="5.429cm" svg:y="4.251cm">
          <draw:text-box>
            <text:p text:style-name="P3"><text:span text:style-name="T5">Ethnicity</text:span></text:p>
          </draw:text-box>
        </draw:frame>
        <draw:frame draw:style-name="gr67" draw:text-style-name="P8" draw:layer="layout" svg:width="0.98cm" svg:height="0.298cm" svg:x="6.255cm" svg:y="23.342cm">
          <draw:text-box>
            <text:p text:style-name="P3"><text:span text:style-name="T5">Licenses</text:span></text:p>
          </draw:text-box>
        </draw:frame>
        <draw:frame draw:style-name="gr68" draw:text-style-name="P8" draw:layer="layout" svg:width="0.341cm" svg:height="0.289cm" svg:x="11.563cm" svg:y="4.62cm">
          <draw:text-box>
            <text:p text:style-name="P3"><text:span text:style-name="T10">DV</text:span></text:p>
          </draw:text-box>
        </draw:frame>
        <draw:frame draw:style-name="gr69" draw:text-style-name="P8" draw:layer="layout" svg:width="0.629cm" svg:height="0.289cm" svg:x="12.781cm" svg:y="4.62cm">
          <draw:text-box>
            <text:p text:style-name="P3"><text:span text:style-name="T10">Mode</text:span></text:p>
          </draw:text-box>
        </draw:frame>
        <draw:frame draw:style-name="gr70" draw:text-style-name="P8" draw:layer="layout" svg:width="0.62cm" svg:height="0.289cm" svg:x="13.998cm" svg:y="4.62cm">
          <draw:text-box>
            <text:p text:style-name="P3"><text:span text:style-name="T10">Close</text:span></text:p>
          </draw:text-box>
        </draw:frame>
        <draw:frame draw:style-name="gr71" draw:text-style-name="P8" draw:layer="layout" svg:width="0.565cm" svg:height="0.289cm" svg:x="15.215cm" svg:y="4.62cm">
          <draw:text-box>
            <text:p text:style-name="P3"><text:span text:style-name="T10">Near</text:span></text:p>
          </draw:text-box>
        </draw:frame>
        <draw:frame draw:style-name="gr72" draw:text-style-name="P8" draw:layer="layout" svg:width="0.391cm" svg:height="0.289cm" svg:x="16.433cm" svg:y="4.62cm">
          <draw:text-box>
            <text:p text:style-name="P3"><text:span text:style-name="T10">Far</text:span></text:p>
          </draw:text-box>
        </draw:frame>
        <draw:frame draw:style-name="gr73" draw:text-style-name="P8" draw:layer="layout" svg:width="0.95cm" svg:height="0.289cm" svg:x="17.65cm" svg:y="4.62cm">
          <draw:text-box>
            <text:p text:style-name="P3"><text:span text:style-name="T10">Extreme</text:span></text:p>
          </draw:text-box>
        </draw:frame>
        <draw:frame draw:style-name="gr74" draw:text-style-name="P8" draw:layer="layout" svg:width="0.709cm" svg:height="0.289cm" svg:x="18.868cm" svg:y="4.62cm">
          <draw:text-box>
            <text:p text:style-name="P3"><text:span text:style-name="T10">Ammo</text:span></text:p>
          </draw:text-box>
        </draw:frame>
        <draw:line draw:style-name="gr15" draw:text-style-name="P2" draw:layer="layout" svg:x1="5.574cm" svg:y1="13.762cm" svg:x2="1.373cm" svg:y2="13.762cm">
          <text:p/>
        </draw:line>
        <draw:line draw:style-name="gr15" draw:text-style-name="P2" draw:layer="layout" svg:x1="10.122cm" svg:y1="13.762cm" svg:x2="5.922cm" svg:y2="13.762cm">
          <text:p/>
        </draw:line>
        <draw:frame draw:style-name="gr68" draw:text-style-name="P8" draw:layer="layout" svg:width="0.341cm" svg:height="0.289cm" svg:x="11.563cm" svg:y="5.622cm">
          <draw:text-box>
            <text:p text:style-name="P3"><text:span text:style-name="T10">DV</text:span></text:p>
          </draw:text-box>
        </draw:frame>
        <draw:frame draw:style-name="gr70" draw:text-style-name="P8" draw:layer="layout" svg:width="0.62cm" svg:height="0.289cm" svg:x="13.693cm" svg:y="5.622cm">
          <draw:text-box>
            <text:p text:style-name="P3"><text:span text:style-name="T10">Close</text:span></text:p>
          </draw:text-box>
        </draw:frame>
        <draw:frame draw:style-name="gr75" draw:text-style-name="P5" draw:layer="layout" svg:width="0.472cm" svg:height="0.255cm" svg:x="1.375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3.193cm" svg:y="13.484cm">
          <draw:text-box>
            <text:p text:style-name="P3"><text:span text:style-name="T6">RNK </text:span></text:p>
          </draw:text-box>
        </draw:frame>
        <draw:frame draw:style-name="gr77" draw:text-style-name="P5" draw:layer="layout" svg:width="0.396cm" svg:height="0.255cm" svg:x="4.096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4.902cm" svg:y="13.484cm">
          <draw:text-box>
            <text:p text:style-name="P3"><text:span text:style-name="T6">Type</text:span></text:p>
          </draw:text-box>
        </draw:frame>
        <draw:frame draw:style-name="gr75" draw:text-style-name="P5" draw:layer="layout" svg:width="0.472cm" svg:height="0.255cm" svg:x="5.922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7.741cm" svg:y="13.484cm">
          <draw:text-box>
            <text:p text:style-name="P3"><text:span text:style-name="T6">RNK </text:span></text:p>
          </draw:text-box>
        </draw:frame>
        <draw:line draw:style-name="gr78" draw:text-style-name="P2" draw:layer="layout" svg:x1="11.608cm" svg:y1="9.229cm" svg:x2="11.608cm" svg:y2="7.973cm">
          <text:p/>
        </draw:line>
        <draw:line draw:style-name="gr78" draw:text-style-name="P2" draw:layer="layout" svg:x1="11.608cm" svg:y1="10.499cm" svg:x2="11.608cm" svg:y2="9.229cm">
          <text:p/>
        </draw:line>
        <draw:line draw:style-name="gr78" draw:text-style-name="P2" draw:layer="layout" svg:x1="11.608cm" svg:y1="11.769cm" svg:x2="11.608cm" svg:y2="10.499cm">
          <text:p/>
        </draw:line>
        <draw:line draw:style-name="gr78" draw:text-style-name="P2" draw:layer="layout" svg:x1="11.608cm" svg:y1="13.039cm" svg:x2="11.608cm" svg:y2="11.769cm">
          <text:p/>
        </draw:line>
        <draw:line draw:style-name="gr78" draw:text-style-name="P2" draw:layer="layout" svg:x1="11.608cm" svg:y1="14.309cm" svg:x2="11.608cm" svg:y2="13.039cm">
          <text:p/>
        </draw:line>
        <draw:line draw:style-name="gr78" draw:text-style-name="P2" draw:layer="layout" svg:x1="11.608cm" svg:y1="15.566cm" svg:x2="11.608cm" svg:y2="14.309cm">
          <text:p/>
        </draw:line>
        <draw:line draw:style-name="gr78" draw:text-style-name="P2" draw:layer="layout" svg:x1="11.594cm" svg:y1="7.959cm" svg:x2="12.878cm" svg:y2="7.959cm">
          <text:p/>
        </draw:line>
        <draw:line draw:style-name="gr78" draw:text-style-name="P2" draw:layer="layout" svg:x1="12.878cm" svg:y1="7.959cm" svg:x2="14.148cm" svg:y2="7.959cm">
          <text:p/>
        </draw:line>
        <draw:line draw:style-name="gr79" draw:text-style-name="P2" draw:layer="layout" svg:x1="12.878cm" svg:y1="9.212cm" svg:x2="12.878cm" svg:y2="7.973cm">
          <text:p/>
        </draw:line>
        <draw:line draw:style-name="gr79" draw:text-style-name="P2" draw:layer="layout" svg:x1="12.878cm" svg:y1="10.482cm" svg:x2="12.878cm" svg:y2="9.247cm">
          <text:p/>
        </draw:line>
        <draw:line draw:style-name="gr79" draw:text-style-name="P2" draw:layer="layout" svg:x1="12.878cm" svg:y1="11.752cm" svg:x2="12.878cm" svg:y2="10.517cm">
          <text:p/>
        </draw:line>
        <draw:line draw:style-name="gr79" draw:text-style-name="P2" draw:layer="layout" svg:x1="12.878cm" svg:y1="13.022cm" svg:x2="12.878cm" svg:y2="11.787cm">
          <text:p/>
        </draw:line>
        <draw:line draw:style-name="gr79" draw:text-style-name="P2" draw:layer="layout" svg:x1="12.878cm" svg:y1="14.292cm" svg:x2="12.878cm" svg:y2="13.057cm">
          <text:p/>
        </draw:line>
        <draw:line draw:style-name="gr79" draw:text-style-name="P2" draw:layer="layout" svg:x1="12.878cm" svg:y1="15.566cm" svg:x2="12.878cm" svg:y2="14.327cm">
          <text:p/>
        </draw:line>
        <draw:line draw:style-name="gr79" draw:text-style-name="P2" draw:layer="layout" svg:x1="11.62cm" svg:y1="9.229cm" svg:x2="12.878cm" svg:y2="9.229cm">
          <text:p/>
        </draw:line>
        <draw:line draw:style-name="gr79" draw:text-style-name="P2" draw:layer="layout" svg:x1="12.878cm" svg:y1="9.229cm" svg:x2="14.148cm" svg:y2="9.229cm">
          <text:p/>
        </draw:line>
        <draw:line draw:style-name="gr79" draw:text-style-name="P2" draw:layer="layout" svg:x1="11.62cm" svg:y1="10.499cm" svg:x2="12.878cm" svg:y2="10.499cm">
          <text:p/>
        </draw:line>
        <draw:line draw:style-name="gr79" draw:text-style-name="P2" draw:layer="layout" svg:x1="12.878cm" svg:y1="10.499cm" svg:x2="14.148cm" svg:y2="10.499cm">
          <text:p/>
        </draw:line>
        <draw:line draw:style-name="gr79" draw:text-style-name="P2" draw:layer="layout" svg:x1="11.62cm" svg:y1="11.769cm" svg:x2="12.878cm" svg:y2="11.769cm">
          <text:p/>
        </draw:line>
        <draw:line draw:style-name="gr79" draw:text-style-name="P2" draw:layer="layout" svg:x1="12.878cm" svg:y1="11.769cm" svg:x2="14.148cm" svg:y2="11.769cm">
          <text:p/>
        </draw:line>
        <draw:line draw:style-name="gr79" draw:text-style-name="P2" draw:layer="layout" svg:x1="11.62cm" svg:y1="13.039cm" svg:x2="12.878cm" svg:y2="13.039cm">
          <text:p/>
        </draw:line>
        <draw:line draw:style-name="gr79" draw:text-style-name="P2" draw:layer="layout" svg:x1="12.878cm" svg:y1="13.039cm" svg:x2="14.148cm" svg:y2="13.039cm">
          <text:p/>
        </draw:line>
        <draw:line draw:style-name="gr79" draw:text-style-name="P2" draw:layer="layout" svg:x1="11.62cm" svg:y1="14.309cm" svg:x2="12.878cm" svg:y2="14.309cm">
          <text:p/>
        </draw:line>
        <draw:line draw:style-name="gr79" draw:text-style-name="P2" draw:layer="layout" svg:x1="12.878cm" svg:y1="14.309cm" svg:x2="14.148cm" svg:y2="14.309cm">
          <text:p/>
        </draw:line>
        <draw:line draw:style-name="gr78" draw:text-style-name="P2" draw:layer="layout" svg:x1="11.594cm" svg:y1="15.579cm" svg:x2="12.878cm" svg:y2="15.579cm">
          <text:p/>
        </draw:line>
        <draw:line draw:style-name="gr78" draw:text-style-name="P2" draw:layer="layout" svg:x1="12.878cm" svg:y1="15.579cm" svg:x2="14.148cm" svg:y2="15.579cm">
          <text:p/>
        </draw:line>
        <draw:line draw:style-name="gr79" draw:text-style-name="P2" draw:layer="layout" svg:x1="14.148cm" svg:y1="9.212cm" svg:x2="14.148cm" svg:y2="7.973cm">
          <text:p/>
        </draw:line>
        <draw:line draw:style-name="gr79" draw:text-style-name="P2" draw:layer="layout" svg:x1="14.148cm" svg:y1="10.482cm" svg:x2="14.148cm" svg:y2="9.247cm">
          <text:p/>
        </draw:line>
        <draw:line draw:style-name="gr79" draw:text-style-name="P2" draw:layer="layout" svg:x1="14.148cm" svg:y1="11.752cm" svg:x2="14.148cm" svg:y2="10.517cm">
          <text:p/>
        </draw:line>
        <draw:line draw:style-name="gr79" draw:text-style-name="P2" draw:layer="layout" svg:x1="14.148cm" svg:y1="13.022cm" svg:x2="14.148cm" svg:y2="11.787cm">
          <text:p/>
        </draw:line>
        <draw:line draw:style-name="gr79" draw:text-style-name="P2" draw:layer="layout" svg:x1="14.148cm" svg:y1="14.292cm" svg:x2="14.148cm" svg:y2="13.057cm">
          <text:p/>
        </draw:line>
        <draw:line draw:style-name="gr79" draw:text-style-name="P2" draw:layer="layout" svg:x1="14.148cm" svg:y1="15.566cm" svg:x2="14.148cm" svg:y2="14.327cm">
          <text:p/>
        </draw:line>
        <draw:line draw:style-name="gr78" draw:text-style-name="P2" draw:layer="layout" svg:x1="14.148cm" svg:y1="7.959cm" svg:x2="15.43cm" svg:y2="7.959cm">
          <text:p/>
        </draw:line>
        <draw:line draw:style-name="gr78" draw:text-style-name="P2" draw:layer="layout" svg:x1="15.418cm" svg:y1="9.229cm" svg:x2="15.418cm" svg:y2="7.973cm">
          <text:p/>
        </draw:line>
        <draw:line draw:style-name="gr78" draw:text-style-name="P2" draw:layer="layout" svg:x1="15.418cm" svg:y1="10.499cm" svg:x2="15.418cm" svg:y2="9.229cm">
          <text:p/>
        </draw:line>
        <draw:line draw:style-name="gr78" draw:text-style-name="P2" draw:layer="layout" svg:x1="15.418cm" svg:y1="11.769cm" svg:x2="15.418cm" svg:y2="10.499cm">
          <text:p/>
        </draw:line>
        <draw:line draw:style-name="gr78" draw:text-style-name="P2" draw:layer="layout" svg:x1="15.418cm" svg:y1="13.039cm" svg:x2="15.418cm" svg:y2="11.769cm">
          <text:p/>
        </draw:line>
        <draw:line draw:style-name="gr78" draw:text-style-name="P2" draw:layer="layout" svg:x1="15.418cm" svg:y1="14.309cm" svg:x2="15.418cm" svg:y2="13.039cm">
          <text:p/>
        </draw:line>
        <draw:line draw:style-name="gr78" draw:text-style-name="P2" draw:layer="layout" svg:x1="15.418cm" svg:y1="15.566cm" svg:x2="15.418cm" svg:y2="14.309cm">
          <text:p/>
        </draw:line>
        <draw:line draw:style-name="gr79" draw:text-style-name="P2" draw:layer="layout" svg:x1="14.148cm" svg:y1="9.229cm" svg:x2="15.404cm" svg:y2="9.229cm">
          <text:p/>
        </draw:line>
        <draw:line draw:style-name="gr79" draw:text-style-name="P2" draw:layer="layout" svg:x1="14.148cm" svg:y1="10.499cm" svg:x2="15.404cm" svg:y2="10.499cm">
          <text:p/>
        </draw:line>
        <draw:line draw:style-name="gr79" draw:text-style-name="P2" draw:layer="layout" svg:x1="14.148cm" svg:y1="11.769cm" svg:x2="15.404cm" svg:y2="11.769cm">
          <text:p/>
        </draw:line>
        <draw:line draw:style-name="gr79" draw:text-style-name="P2" draw:layer="layout" svg:x1="14.148cm" svg:y1="13.039cm" svg:x2="15.404cm" svg:y2="13.039cm">
          <text:p/>
        </draw:line>
        <draw:line draw:style-name="gr79" draw:text-style-name="P2" draw:layer="layout" svg:x1="14.148cm" svg:y1="14.309cm" svg:x2="15.404cm" svg:y2="14.309cm">
          <text:p/>
        </draw:line>
        <draw:line draw:style-name="gr78" draw:text-style-name="P2" draw:layer="layout" svg:x1="14.148cm" svg:y1="15.579cm" svg:x2="15.43cm" svg:y2="15.579cm">
          <text:p/>
        </draw:line>
        <draw:frame draw:style-name="gr77" draw:text-style-name="P5" draw:layer="layout" svg:width="0.396cm" svg:height="0.255cm" svg:x="8.643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9.449cm" svg:y="13.484cm">
          <draw:text-box>
            <text:p text:style-name="P3"><text:span text:style-name="T6">Type</text:span></text:p>
          </draw:text-box>
        </draw:frame>
        <draw:frame draw:style-name="gr80" draw:text-style-name="P11" draw:layer="layout" svg:width="0.425cm" svg:height="0.497cm" svg:x="14.997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4.961cm" svg:y="9.967cm">
          <draw:text-box>
            <text:p text:style-name="P3"><text:span text:style-name="T11">-2</text:span></text:p>
          </draw:text-box>
        </draw:frame>
        <draw:frame draw:style-name="gr80" draw:text-style-name="P11" draw:layer="layout" svg:width="0.425cm" svg:height="0.497cm" svg:x="14.959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4.909cm" svg:y="12.507cm">
          <draw:text-box>
            <text:p text:style-name="P3"><text:span text:style-name="T11">-4</text:span></text:p>
          </draw:text-box>
        </draw:frame>
        <draw:line draw:style-name="gr78" draw:text-style-name="P2" draw:layer="layout" svg:x1="16.206cm" svg:y1="9.229cm" svg:x2="16.206cm" svg:y2="7.973cm">
          <text:p/>
        </draw:line>
        <draw:line draw:style-name="gr78" draw:text-style-name="P2" draw:layer="layout" svg:x1="16.206cm" svg:y1="10.499cm" svg:x2="16.206cm" svg:y2="9.229cm">
          <text:p/>
        </draw:line>
        <draw:line draw:style-name="gr78" draw:text-style-name="P2" draw:layer="layout" svg:x1="16.206cm" svg:y1="11.769cm" svg:x2="16.206cm" svg:y2="10.499cm">
          <text:p/>
        </draw:line>
        <draw:line draw:style-name="gr78" draw:text-style-name="P2" draw:layer="layout" svg:x1="16.206cm" svg:y1="13.026cm" svg:x2="16.206cm" svg:y2="11.769cm">
          <text:p/>
        </draw:line>
        <draw:line draw:style-name="gr78" draw:text-style-name="P2" draw:layer="layout" svg:x1="16.192cm" svg:y1="7.959cm" svg:x2="17.476cm" svg:y2="7.959cm">
          <text:p/>
        </draw:line>
        <draw:line draw:style-name="gr78" draw:text-style-name="P2" draw:layer="layout" svg:x1="17.476cm" svg:y1="7.959cm" svg:x2="18.746cm" svg:y2="7.959cm">
          <text:p/>
        </draw:line>
        <draw:line draw:style-name="gr79" draw:text-style-name="P2" draw:layer="layout" svg:x1="17.476cm" svg:y1="9.212cm" svg:x2="17.476cm" svg:y2="7.973cm">
          <text:p/>
        </draw:line>
        <draw:line draw:style-name="gr79" draw:text-style-name="P2" draw:layer="layout" svg:x1="17.476cm" svg:y1="10.482cm" svg:x2="17.476cm" svg:y2="9.247cm">
          <text:p/>
        </draw:line>
        <draw:line draw:style-name="gr79" draw:text-style-name="P2" draw:layer="layout" svg:x1="17.476cm" svg:y1="11.752cm" svg:x2="17.476cm" svg:y2="10.517cm">
          <text:p/>
        </draw:line>
        <draw:line draw:style-name="gr79" draw:text-style-name="P2" draw:layer="layout" svg:x1="17.476cm" svg:y1="13.026cm" svg:x2="17.476cm" svg:y2="11.787cm">
          <text:p/>
        </draw:line>
        <draw:line draw:style-name="gr79" draw:text-style-name="P2" draw:layer="layout" svg:x1="16.218cm" svg:y1="9.229cm" svg:x2="17.476cm" svg:y2="9.229cm">
          <text:p/>
        </draw:line>
        <draw:line draw:style-name="gr79" draw:text-style-name="P2" draw:layer="layout" svg:x1="17.476cm" svg:y1="9.229cm" svg:x2="18.746cm" svg:y2="9.229cm">
          <text:p/>
        </draw:line>
        <draw:line draw:style-name="gr79" draw:text-style-name="P2" draw:layer="layout" svg:x1="16.218cm" svg:y1="10.499cm" svg:x2="17.476cm" svg:y2="10.499cm">
          <text:p/>
        </draw:line>
        <draw:line draw:style-name="gr79" draw:text-style-name="P2" draw:layer="layout" svg:x1="17.476cm" svg:y1="10.499cm" svg:x2="18.746cm" svg:y2="10.499cm">
          <text:p/>
        </draw:line>
        <draw:line draw:style-name="gr79" draw:text-style-name="P2" draw:layer="layout" svg:x1="16.218cm" svg:y1="11.769cm" svg:x2="17.476cm" svg:y2="11.769cm">
          <text:p/>
        </draw:line>
        <draw:line draw:style-name="gr79" draw:text-style-name="P2" draw:layer="layout" svg:x1="17.476cm" svg:y1="11.769cm" svg:x2="18.746cm" svg:y2="11.769cm">
          <text:p/>
        </draw:line>
        <draw:line draw:style-name="gr78" draw:text-style-name="P2" draw:layer="layout" svg:x1="16.192cm" svg:y1="13.039cm" svg:x2="17.476cm" svg:y2="13.039cm">
          <text:p/>
        </draw:line>
        <draw:line draw:style-name="gr78" draw:text-style-name="P2" draw:layer="layout" svg:x1="17.476cm" svg:y1="13.039cm" svg:x2="18.746cm" svg:y2="13.039cm">
          <text:p/>
        </draw:line>
        <draw:line draw:style-name="gr79" draw:text-style-name="P2" draw:layer="layout" svg:x1="18.746cm" svg:y1="9.212cm" svg:x2="18.746cm" svg:y2="7.973cm">
          <text:p/>
        </draw:line>
        <draw:line draw:style-name="gr79" draw:text-style-name="P2" draw:layer="layout" svg:x1="18.746cm" svg:y1="10.482cm" svg:x2="18.746cm" svg:y2="9.247cm">
          <text:p/>
        </draw:line>
        <draw:line draw:style-name="gr79" draw:text-style-name="P2" draw:layer="layout" svg:x1="18.746cm" svg:y1="11.752cm" svg:x2="18.746cm" svg:y2="10.517cm">
          <text:p/>
        </draw:line>
        <draw:line draw:style-name="gr79" draw:text-style-name="P2" draw:layer="layout" svg:x1="18.746cm" svg:y1="13.026cm" svg:x2="18.746cm" svg:y2="11.787cm">
          <text:p/>
        </draw:line>
        <draw:line draw:style-name="gr78" draw:text-style-name="P2" draw:layer="layout" svg:x1="18.746cm" svg:y1="7.959cm" svg:x2="20.028cm" svg:y2="7.959cm">
          <text:p/>
        </draw:line>
        <draw:line draw:style-name="gr78" draw:text-style-name="P2" draw:layer="layout" svg:x1="20.016cm" svg:y1="9.229cm" svg:x2="20.016cm" svg:y2="7.973cm">
          <text:p/>
        </draw:line>
        <draw:line draw:style-name="gr78" draw:text-style-name="P2" draw:layer="layout" svg:x1="20.016cm" svg:y1="10.499cm" svg:x2="20.016cm" svg:y2="9.229cm">
          <text:p/>
        </draw:line>
        <draw:line draw:style-name="gr78" draw:text-style-name="P2" draw:layer="layout" svg:x1="20.016cm" svg:y1="11.769cm" svg:x2="20.016cm" svg:y2="10.499cm">
          <text:p/>
        </draw:line>
        <draw:line draw:style-name="gr78" draw:text-style-name="P2" draw:layer="layout" svg:x1="20.016cm" svg:y1="13.026cm" svg:x2="20.016cm" svg:y2="11.769cm">
          <text:p/>
        </draw:line>
        <draw:line draw:style-name="gr79" draw:text-style-name="P2" draw:layer="layout" svg:x1="18.746cm" svg:y1="9.229cm" svg:x2="20.002cm" svg:y2="9.229cm">
          <text:p/>
        </draw:line>
        <draw:line draw:style-name="gr79" draw:text-style-name="P2" draw:layer="layout" svg:x1="18.746cm" svg:y1="10.499cm" svg:x2="20.002cm" svg:y2="10.499cm">
          <text:p/>
        </draw:line>
        <draw:line draw:style-name="gr79" draw:text-style-name="P2" draw:layer="layout" svg:x1="18.746cm" svg:y1="11.769cm" svg:x2="20.002cm" svg:y2="11.769cm">
          <text:p/>
        </draw:line>
        <draw:line draw:style-name="gr78" draw:text-style-name="P2" draw:layer="layout" svg:x1="18.746cm" svg:y1="13.039cm" svg:x2="20.028cm" svg:y2="13.039cm">
          <text:p/>
        </draw:line>
        <draw:frame draw:style-name="gr80" draw:text-style-name="P11" draw:layer="layout" svg:width="0.425cm" svg:height="0.497cm" svg:x="14.945cm" svg:y="13.777cm">
          <draw:text-box>
            <text:p text:style-name="P3"><text:span text:style-name="T11">-5</text:span></text:p>
          </draw:text-box>
        </draw:frame>
        <draw:frame draw:style-name="gr80" draw:text-style-name="P11" draw:layer="layout" svg:width="0.425cm" svg:height="0.497cm" svg:x="14.915cm" svg:y="15.047cm">
          <draw:text-box>
            <text:p text:style-name="P3"><text:span text:style-name="T11">-6</text:span></text:p>
          </draw:text-box>
        </draw:frame>
        <draw:frame draw:style-name="gr80" draw:text-style-name="P11" draw:layer="layout" svg:width="0.425cm" svg:height="0.497cm" svg:x="19.595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9.558cm" svg:y="9.967cm">
          <draw:text-box>
            <text:p text:style-name="P3"><text:span text:style-name="T11">-2</text:span></text:p>
          </draw:text-box>
        </draw:frame>
        <draw:polyline draw:style-name="gr81" draw:text-style-name="P2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text-style-name="P1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text-style-name="P12" draw:layer="layout" svg:width="0.25cm" svg:height="0.181cm" svg:x="14.4cm" svg:y="14.862cm" svg:viewBox="0 0 251 182" svg:d="M251 91l-251-91c0 0 57 91 0 182z">
          <text:p/>
        </draw:path>
        <draw:polyline draw:style-name="gr81" draw:text-style-name="P2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text-style-name="P1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text-style-name="P12" draw:layer="layout" svg:width="0.248cm" svg:height="0.181cm" svg:x="19.249cm" svg:y="12.338cm" svg:viewBox="0 0 249 182" svg:d="M249 90l-249-90c0 0 55 90 0 182z">
          <text:p/>
        </draw:path>
        <draw:frame draw:style-name="gr80" draw:text-style-name="P11" draw:layer="layout" svg:width="0.425cm" svg:height="0.497cm" svg:x="19.556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9.506cm" svg:y="12.507cm">
          <draw:text-box>
            <text:p text:style-name="P3"><text:span text:style-name="T11">-4</text:span></text:p>
          </draw:text-box>
        </draw:frame>
        <draw:frame draw:style-name="gr83" draw:text-style-name="P8" draw:layer="layout" svg:width="4.604cm" svg:height="0.289cm" svg:x="15.816cm" svg:y="14.008cm">
          <draw:text-box>
            <text:p text:style-name="P3"><text:span text:style-name="T10">For every 3 boxes of damage on any one </text:span></text:p>
          </draw:text-box>
        </draw:frame>
        <draw:frame draw:style-name="gr84" draw:text-style-name="P8" draw:layer="layout" svg:width="5.048cm" svg:height="0.289cm" svg:x="15.702cm" svg:y="14.326cm">
          <draw:text-box>
            <text:p text:style-name="P3"><text:span text:style-name="T10">damage track, the character takes a –1 Dice </text:span></text:p>
          </draw:text-box>
        </draw:frame>
        <draw:polygon draw:style-name="gr85" draw:text-style-name="P1" draw:layer="layout" svg:width="0.301cm" svg:height="0.347cm" svg:x="2.966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3.264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3.564cm" svg:y="11.192cm" svg:viewBox="0 0 301 348" draw:points="301,262 301,89 150,0 0,89 0,262 150,348">
          <text:p/>
        </draw:polygon>
        <draw:polygon draw:style-name="gr85" draw:text-style-name="P1" draw:layer="layout" svg:width="0.302cm" svg:height="0.347cm" svg:x="3.862cm" svg:y="11.192cm" svg:viewBox="0 0 303 348" draw:points="303,262 303,89 150,0 0,89 0,262 150,348">
          <text:p/>
        </draw:polygon>
        <draw:polygon draw:style-name="gr85" draw:text-style-name="P1" draw:layer="layout" svg:width="0.3cm" svg:height="0.347cm" svg:x="4.162cm" svg:y="11.192cm" svg:viewBox="0 0 301 348" draw:points="301,262 301,89 150,0 0,89 0,262 150,348">
          <text:p/>
        </draw:polygon>
        <draw:polygon draw:style-name="gr85" draw:text-style-name="P1" draw:layer="layout" svg:width="0.301cm" svg:height="0.347cm" svg:x="4.461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4.759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8" draw:layer="layout" svg:width="4.849cm" svg:height="0.289cm" svg:x="15.728cm" svg:y="14.643cm">
          <draw:text-box>
            <text:p text:style-name="P3"><text:span text:style-name="T10">Pool modifier on tests; these modifiers are </text:span></text:p>
          </draw:text-box>
        </draw:frame>
        <draw:frame draw:style-name="gr87" draw:text-style-name="P8" draw:layer="layout" svg:width="5.095cm" svg:height="0.289cm" svg:x="15.635cm" svg:y="14.961cm">
          <draw:text-box>
            <text:p text:style-name="P3"><text:span text:style-name="T10">cumulative within and across damage tracks.</text:span></text:p>
          </draw:text-box>
        </draw:frame>
        <draw:frame draw:style-name="gr88" draw:text-style-name="P8" draw:layer="layout" svg:width="0.65cm" svg:height="0.298cm" svg:x="11.746cm" svg:y="22.822cm">
          <draw:text-box>
            <text:p text:style-name="P3"><text:span text:style-name="T5">Name</text:span></text:p>
          </draw:text-box>
        </draw:frame>
        <draw:line draw:style-name="gr15" draw:text-style-name="P2" draw:layer="layout" svg:x1="20.268cm" svg:y1="23.196cm" svg:x2="11.745cm" svg:y2="23.196cm">
          <text:p/>
        </draw:line>
        <draw:frame draw:style-name="gr89" draw:text-style-name="P8" draw:layer="layout" svg:width="0.798cm" svg:height="0.298cm" svg:x="15.494cm" svg:y="22.822cm">
          <draw:text-box>
            <text:p text:style-name="P3"><text:span text:style-name="T5">Loyalty</text:span></text:p>
          </draw:text-box>
        </draw:frame>
        <draw:frame draw:style-name="gr90" draw:text-style-name="P8" draw:layer="layout" svg:width="1.23cm" svg:height="0.298cm" svg:x="17.108cm" svg:y="22.822cm">
          <draw:text-box>
            <text:p text:style-name="P3"><text:span text:style-name="T5">Connection</text:span></text:p>
          </draw:text-box>
        </draw:frame>
        <draw:frame draw:style-name="gr91" draw:text-style-name="P4" draw:layer="layout" svg:width="0.281cm" svg:height="0.319cm" svg:x="3.049cm" svg:y="7.108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527cm">
          <draw:text-box>
            <text:p text:style-name="P3"><text:span text:style-name="T12">4</text:span></text:p>
          </draw:text-box>
        </draw:frame>
        <draw:frame draw:style-name="gr91" draw:text-style-name="P4" draw:layer="layout" svg:width="0.281cm" svg:height="0.319cm" svg:x="3.049cm" svg:y="7.984cm">
          <draw:text-box>
            <text:p text:style-name="P3"><text:span text:style-name="T12">5</text:span></text:p>
          </draw:text-box>
        </draw:frame>
        <draw:frame draw:style-name="gr92" draw:text-style-name="P4" draw:layer="layout" svg:width="0.48cm" svg:height="0.319cm" svg:x="3.049cm" svg:y="8.441cm">
          <draw:text-box>
            <text:p text:style-name="P3"><text:span text:style-name="T12">4+2</text:span></text:p>
          </draw:text-box>
        </draw:frame>
        <draw:frame draw:style-name="gr91" draw:text-style-name="P4" draw:layer="layout" svg:width="0.281cm" svg:height="0.319cm" svg:x="3.049cm" svg:y="8.899cm">
          <draw:text-box>
            <text:p text:style-name="P3"><text:span text:style-name="T12">2</text:span></text:p>
          </draw:text-box>
        </draw:frame>
        <draw:frame draw:style-name="gr91" draw:text-style-name="P4" draw:layer="layout" svg:width="0.281cm" svg:height="0.319cm" svg:x="3.049cm" svg:y="9.356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9.813cm">
          <draw:text-box>
            <text:p text:style-name="P3"><text:span text:style-name="T12">3</text:span></text:p>
          </draw:text-box>
        </draw:frame>
        <draw:frame draw:style-name="gr93" draw:text-style-name="P4" draw:layer="layout" svg:width="0.802cm" svg:height="0.637cm" svg:x="3.049cm" svg:y="10.27cm">
          <draw:text-box>
            <text:p text:style-name="P3"><text:span text:style-name="T12">1+2=3</text:span></text:p>
            <text:p text:style-name="P3"><text:span text:style-name="T12"/></text:p>
          </draw:text-box>
        </draw:frame>
        <draw:frame draw:style-name="gr92" draw:text-style-name="P4" draw:layer="layout" svg:width="0.48cm" svg:height="0.319cm" svg:x="3.049cm" svg:y="10.717cm">
          <draw:text-box>
            <text:p text:style-name="P3"><text:span text:style-name="T12">1+4</text:span></text:p>
          </draw:text-box>
        </draw:frame>
        <draw:frame draw:style-name="gr94" draw:text-style-name="P13" draw:layer="layout" svg:width="0.747cm" svg:height="0.399cm" svg:x="14.571cm" svg:y="1.431cm">
          <draw:text-box>
            <text:p><text:span text:style-name="T13">Влад</text:span></text:p>
          </draw:text-box>
        </draw:frame>
        <draw:frame draw:style-name="gr95" draw:text-style-name="P4" draw:layer="layout" svg:width="7.946cm" svg:height="5.089cm" svg:x="1.304cm" svg:y="14cm">
          <draw:text-box>
            <text:p text:style-name="P3"><text:span text:style-name="T14">Пилотирование </text:span><text:span text:style-name="T12">6 </text:span></text:p>
            <text:p text:style-name="P3"><text:span text:style-name="T12">(+2 эксперт наземный, +1 мастер), </text:span></text:p>
            <text:p text:style-name="P3"><text:span text:style-name="T14">Электроника </text:span><text:span text:style-name="T12">3, </text:span></text:p>
            <text:p text:style-name="P3"><text:span text:style-name="T14">Инженерное дело </text:span><text:span text:style-name="T12">4 (+2 эксперт автомеханик) , </text:span></text:p>
            <text:p text:style-name="P3"><text:span text:style-name="T14">Стрельба </text:span><text:span text:style-name="T12">4, </text:span><text:span text:style-name="T14">ближний бой </text:span><text:span text:style-name="T12">3, </text:span></text:p>
            <text:p text:style-name="P3"><text:span text:style-name="T14">ориентирование </text:span><text:span text:style-name="T12">5, </text:span></text:p>
            <text:p text:style-name="P3"><text:span text:style-name="T14">Атлетика </text:span><text:span text:style-name="T12">3, </text:span></text:p>
            <text:p text:style-name="P3"><text:span text:style-name="T14">Внимание </text:span><text:span text:style-name="T12">2, </text:span></text:p>
            <text:p text:style-name="P3"><text:span text:style-name="T12"><text:s/></text:span><text:span text:style-name="T14">Убеждение </text:span><text:span text:style-name="T12">2, </text:span></text:p>
            <text:p text:style-name="P3"><text:span text:style-name="T12">Английский 4,</text:span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>Экспертные знания: Обряды нативных племён, </text:span></text:p>
            <text:p text:style-name="P3"><text:span text:style-name="T12">Тягачи Вольво</text:span></text:p>
            <text:p text:style-name="P3"><text:span text:style-name="T12">Инструменты D-walt (Жёлтенькие)</text:span></text:p>
          </draw:text-box>
        </draw:frame>
        <draw:frame draw:style-name="gr96" draw:text-style-name="P4" draw:layer="layout" svg:width="0.502cm" svg:height="0.319cm" svg:x="2.75cm" svg:y="4.181cm">
          <draw:text-box>
            <text:p text:style-name="P3"><text:span text:style-name="T14">Орк</text:span></text:p>
          </draw:text-box>
        </draw:frame>
        <draw:frame draw:style-name="gr97" draw:text-style-name="P4" draw:layer="layout" svg:width="2.974cm" svg:height="0.319cm" svg:x="6.526cm" svg:y="4.181cm">
          <draw:text-box>
            <text:p text:style-name="P3"><text:span text:style-name="T14">Нативный американец</text:span></text:p>
          </draw:text-box>
        </draw:frame>
        <draw:frame draw:style-name="gr98" draw:text-style-name="P14" draw:layer="layout" svg:width="0.315cm" svg:height="0.319cm" svg:x="2.185cm" svg:y="4.638cm">
          <draw:text-box>
            <text:p text:style-name="P3"><text:span text:style-name="T12">33</text:span></text:p>
          </draw:text-box>
        </draw:frame>
        <draw:frame draw:style-name="gr99" draw:text-style-name="P14" draw:layer="layout" svg:width="0.345cm" svg:height="0.319cm" svg:x="3.905cm" svg:y="4.638cm">
          <draw:text-box>
            <text:p text:style-name="P3"><text:span text:style-name="T14">М</text:span></text:p>
          </draw:text-box>
        </draw:frame>
        <draw:polygon draw:style-name="gr1" draw:text-style-name="P1" draw:layer="layout" svg:width="0.637cm" svg:height="0.637cm" svg:x="11.952cm" svg:y="8.317cm" svg:viewBox="0 0 638 638" draw:points="0,638 638,638 638,0 0,0">
          <text:p/>
        </draw:polygon>
        <draw:frame draw:style-name="gr100" draw:text-style-name="P14" draw:layer="layout" svg:width="0.903cm" svg:height="0.319cm" svg:x="6.25cm" svg:y="4.638cm">
          <draw:text-box>
            <text:p text:style-name="P3"><text:span text:style-name="T12">210 см</text:span></text:p>
          </draw:text-box>
        </draw:frame>
        <draw:polygon draw:style-name="gr101" draw:text-style-name="P2" draw:layer="layout" svg:width="0.601cm" svg:height="0.601cm" svg:x="11.969cm" svg:y="8.334cm" svg:viewBox="0 0 602 602" draw:points="0,602 602,602 602,0 0,0">
          <text:p/>
        </draw:polygon>
        <draw:polygon draw:style-name="gr1" draw:text-style-name="P1" draw:layer="layout" svg:width="0.638cm" svg:height="0.637cm" svg:x="13.112cm" svg:y="8.317cm" svg:viewBox="0 0 639 638" draw:points="0,638 639,638 639,0 0,0">
          <text:p/>
        </draw:polygon>
        <draw:frame draw:style-name="gr102" draw:text-style-name="P15" draw:layer="layout" svg:width="0.846cm" svg:height="0.954cm" svg:x="11.952cm" svg:y="8.316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3.13cm" svg:y="8.334cm" svg:viewBox="0 0 601 602" draw:points="0,602 601,602 601,0 0,0">
          <text:p/>
        </draw:polygon>
        <draw:polygon draw:style-name="gr1" draw:text-style-name="P1" draw:layer="layout" svg:width="0.637cm" svg:height="0.637cm" svg:x="14.388cm" svg:y="8.298cm" svg:viewBox="0 0 638 638" draw:points="0,638 638,638 638,0 0,0">
          <text:p/>
        </draw:polygon>
        <draw:frame draw:style-name="gr102" draw:text-style-name="P15" draw:layer="layout" svg:width="0.846cm" svg:height="0.954cm" svg:x="13.113cm" svg:y="8.316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4.405cm" svg:y="8.315cm" svg:viewBox="0 0 602 602" draw:points="0,602 602,602 602,0 0,0">
          <text:p/>
        </draw:polygon>
        <draw:polygon draw:style-name="gr1" draw:text-style-name="P1" draw:layer="layout" svg:width="0.638cm" svg:height="0.637cm" svg:x="11.932cm" svg:y="9.63cm" svg:viewBox="0 0 639 638" draw:points="0,638 639,638 639,0 0,0">
          <text:p/>
        </draw:polygon>
        <draw:frame draw:style-name="gr102" draw:text-style-name="P15" draw:layer="layout" svg:width="0.846cm" svg:height="0.954cm" svg:x="14.388cm" svg:y="8.29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1.949cm" svg:y="9.647cm" svg:viewBox="0 0 602 602" draw:points="0,602 602,602 602,0 0,0">
          <text:p/>
        </draw:polygon>
        <draw:polygon draw:style-name="gr1" draw:text-style-name="P1" draw:layer="layout" svg:width="0.638cm" svg:height="0.637cm" svg:x="13.112cm" svg:y="9.611cm" svg:viewBox="0 0 639 638" draw:points="0,638 639,638 639,0 0,0">
          <text:p/>
        </draw:polygon>
        <draw:frame draw:style-name="gr102" draw:text-style-name="P15" draw:layer="layout" svg:width="0.846cm" svg:height="0.954cm" svg:x="11.933cm" svg:y="9.629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3.13cm" svg:y="9.628cm" svg:viewBox="0 0 601 602" draw:points="0,602 601,602 601,0 0,0">
          <text:p/>
        </draw:polygon>
        <draw:polygon draw:style-name="gr1" draw:text-style-name="P1" draw:layer="layout" svg:width="0.636cm" svg:height="0.637cm" svg:x="14.445cm" svg:y="9.611cm" svg:viewBox="0 0 637 638" draw:points="0,638 637,638 637,0 0,0">
          <text:p/>
        </draw:polygon>
        <draw:polygon draw:style-name="gr101" draw:text-style-name="P2" draw:layer="layout" svg:width="0.6cm" svg:height="0.601cm" svg:x="14.463cm" svg:y="9.628cm" svg:viewBox="0 0 601 602" draw:points="0,602 601,602 601,0 0,0">
          <text:p/>
        </draw:polygon>
        <draw:frame draw:style-name="gr102" draw:text-style-name="P15" draw:layer="layout" svg:width="0.846cm" svg:height="0.954cm" svg:x="13.113cm" svg:y="9.61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1.952cm" svg:y="10.829cm" svg:viewBox="0 0 638 638" draw:points="0,638 638,638 638,0 0,0">
          <text:p/>
        </draw:polygon>
        <draw:polygon draw:style-name="gr101" draw:text-style-name="P2" draw:layer="layout" svg:width="0.601cm" svg:height="0.601cm" svg:x="11.969cm" svg:y="10.846cm" svg:viewBox="0 0 602 602" draw:points="0,602 602,602 602,0 0,0">
          <text:p/>
        </draw:polygon>
        <draw:frame draw:style-name="gr102" draw:text-style-name="P15" draw:layer="layout" svg:width="0.846cm" svg:height="0.954cm" svg:x="14.48cm" svg:y="9.644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8cm" svg:height="0.637cm" svg:x="13.112cm" svg:y="10.848cm" svg:viewBox="0 0 639 638" draw:points="0,638 639,638 639,0 0,0">
          <text:p/>
        </draw:polygon>
        <draw:frame draw:style-name="gr102" draw:text-style-name="P15" draw:layer="layout" svg:width="0.846cm" svg:height="0.954cm" svg:x="11.986cm" svg:y="10.862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3.13cm" svg:y="10.865cm" svg:viewBox="0 0 601 602" draw:points="0,602 601,602 601,0 0,0">
          <text:p/>
        </draw:polygon>
        <draw:polygon draw:style-name="gr1" draw:text-style-name="P1" draw:layer="layout" svg:width="0.636cm" svg:height="0.637cm" svg:x="14.445cm" svg:y="10.867cm" svg:viewBox="0 0 637 638" draw:points="0,638 637,638 637,0 0,0">
          <text:p/>
        </draw:polygon>
        <draw:frame draw:style-name="gr102" draw:text-style-name="P15" draw:layer="layout" svg:width="0.846cm" svg:height="0.954cm" svg:x="13.113cm" svg:y="10.84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4.463cm" svg:y="10.884cm" svg:viewBox="0 0 601 602" draw:points="0,602 601,602 601,0 0,0">
          <text:p/>
        </draw:polygon>
        <draw:polygon draw:style-name="gr1" draw:text-style-name="P1" draw:layer="layout" svg:width="0.638cm" svg:height="0.637cm" svg:x="11.932cm" svg:y="12.066cm" svg:viewBox="0 0 639 638" draw:points="0,638 639,638 639,0 0,0">
          <text:p/>
        </draw:polygon>
        <draw:frame draw:style-name="gr102" draw:text-style-name="P15" draw:layer="layout" svg:width="0.846cm" svg:height="0.954cm" svg:x="14.445cm" svg:y="10.866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cm" svg:x="11.949cm" svg:y="12.084cm" svg:viewBox="0 0 602 601" draw:points="0,601 602,601 602,0 0,0">
          <text:p/>
        </draw:polygon>
        <draw:polygon draw:style-name="gr1" draw:text-style-name="P1" draw:layer="layout" svg:width="0.636cm" svg:height="0.637cm" svg:x="13.094cm" svg:y="12.085cm" svg:viewBox="0 0 637 638" draw:points="0,638 637,638 637,0 0,0">
          <text:p/>
        </draw:polygon>
        <draw:polygon draw:style-name="gr101" draw:text-style-name="P2" draw:layer="layout" svg:width="0.602cm" svg:height="0.6cm" svg:x="13.11cm" svg:y="12.103cm" svg:viewBox="0 0 603 601" draw:points="0,601 603,601 603,0 0,0">
          <text:p/>
        </draw:polygon>
        <draw:polygon draw:style-name="gr1" draw:text-style-name="P1" draw:layer="layout" svg:width="0.637cm" svg:height="0.637cm" svg:x="14.426cm" svg:y="12.085cm" svg:viewBox="0 0 638 638" draw:points="0,638 638,638 638,0 0,0">
          <text:p/>
        </draw:polygon>
        <draw:polygon draw:style-name="gr101" draw:text-style-name="P2" draw:layer="layout" svg:width="0.6cm" svg:height="0.6cm" svg:x="14.443cm" svg:y="12.103cm" svg:viewBox="0 0 601 601" draw:points="0,601 601,601 601,0 0,0">
          <text:p/>
        </draw:polygon>
        <draw:polygon draw:style-name="gr1" draw:text-style-name="P1" draw:layer="layout" svg:width="0.636cm" svg:height="0.637cm" svg:x="11.914cm" svg:y="13.303cm" svg:viewBox="0 0 637 638" draw:points="0,638 637,638 637,0 0,0">
          <text:p/>
        </draw:polygon>
        <draw:polygon draw:style-name="gr101" draw:text-style-name="P2" draw:layer="layout" svg:width="0.601cm" svg:height="0.6cm" svg:x="11.931cm" svg:y="13.321cm" svg:viewBox="0 0 602 601" draw:points="0,601 602,601 602,0 0,0">
          <text:p/>
        </draw:polygon>
        <draw:polygon draw:style-name="gr1" draw:text-style-name="P1" draw:layer="layout" svg:width="0.637cm" svg:height="0.637cm" svg:x="13.17cm" svg:y="13.341cm" svg:viewBox="0 0 638 638" draw:points="0,638 638,638 638,0 0,0">
          <text:p/>
        </draw:polygon>
        <draw:polygon draw:style-name="gr101" draw:text-style-name="P2" draw:layer="layout" svg:width="0.601cm" svg:height="0.6cm" svg:x="13.187cm" svg:y="13.359cm" svg:viewBox="0 0 602 601" draw:points="0,601 602,601 602,0 0,0">
          <text:p/>
        </draw:polygon>
        <draw:polygon draw:style-name="gr1" draw:text-style-name="P1" draw:layer="layout" svg:width="0.637cm" svg:height="0.637cm" svg:x="14.426cm" svg:y="13.341cm" svg:viewBox="0 0 638 638" draw:points="0,638 638,638 638,0 0,0">
          <text:p/>
        </draw:polygon>
        <draw:polygon draw:style-name="gr101" draw:text-style-name="P2" draw:layer="layout" svg:width="0.6cm" svg:height="0.6cm" svg:x="14.443cm" svg:y="13.359cm" svg:viewBox="0 0 601 601" draw:points="0,601 601,601 601,0 0,0">
          <text:p/>
        </draw:polygon>
        <draw:polygon draw:style-name="gr1" draw:text-style-name="P1" draw:layer="layout" svg:width="0.638cm" svg:height="0.637cm" svg:x="11.894cm" svg:y="14.578cm" svg:viewBox="0 0 639 638" draw:points="0,638 639,638 639,0 0,0">
          <text:p/>
        </draw:polygon>
        <draw:polygon draw:style-name="gr101" draw:text-style-name="P2" draw:layer="layout" svg:width="0.6cm" svg:height="0.6cm" svg:x="11.912cm" svg:y="14.596cm" svg:viewBox="0 0 601 601" draw:points="0,601 601,601 601,0 0,0">
          <text:p/>
        </draw:polygon>
        <draw:polygon draw:style-name="gr1" draw:text-style-name="P1" draw:layer="layout" svg:width="0.637cm" svg:height="0.637cm" svg:x="13.17cm" svg:y="14.597cm" svg:viewBox="0 0 638 638" draw:points="0,638 638,638 638,0 0,0">
          <text:p/>
        </draw:polygon>
        <draw:polygon draw:style-name="gr101" draw:text-style-name="P2" draw:layer="layout" svg:width="0.601cm" svg:height="0.6cm" svg:x="13.187cm" svg:y="14.615cm" svg:viewBox="0 0 602 601" draw:points="0,601 602,601 602,0 0,0">
          <text:p/>
        </draw:polygon>
        <draw:polygon draw:style-name="gr1" draw:text-style-name="P1" draw:layer="layout" svg:width="0.637cm" svg:height="0.637cm" svg:x="14.406cm" svg:y="14.635cm" svg:viewBox="0 0 638 638" draw:points="0,638 638,638 638,0 0,0">
          <text:p/>
        </draw:polygon>
        <draw:polygon draw:style-name="gr101" draw:text-style-name="P2" draw:layer="layout" svg:width="0.602cm" svg:height="0.601cm" svg:x="14.423cm" svg:y="14.653cm" svg:viewBox="0 0 603 602" draw:points="0,602 603,602 603,0 0,0">
          <text:p/>
        </draw:polygon>
        <draw:polygon draw:style-name="gr1" draw:text-style-name="P1" draw:layer="layout" svg:width="0.637cm" svg:height="0.637cm" svg:x="16.481cm" svg:y="8.298cm" svg:viewBox="0 0 638 638" draw:points="0,638 638,638 638,0 0,0">
          <text:p/>
        </draw:polygon>
        <draw:frame draw:style-name="gr102" draw:text-style-name="P15" draw:layer="layout" svg:width="0.846cm" svg:height="0.954cm" svg:x="11.933cm" svg:y="12.065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6.498cm" svg:y="8.315cm" svg:viewBox="0 0 602 602" draw:points="0,602 602,602 602,0 0,0">
          <text:p/>
        </draw:polygon>
        <draw:polygon draw:style-name="gr1" draw:text-style-name="P1" draw:layer="layout" svg:width="0.636cm" svg:height="0.637cm" svg:x="17.756cm" svg:y="8.278cm" svg:viewBox="0 0 637 638" draw:points="0,638 637,638 637,0 0,0">
          <text:p/>
        </draw:polygon>
        <draw:frame draw:style-name="gr102" draw:text-style-name="P15" draw:layer="layout" svg:width="0.846cm" svg:height="0.954cm" svg:x="16.481cm" svg:y="8.29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7.774cm" svg:y="8.296cm" svg:viewBox="0 0 601 602" draw:points="0,602 601,602 601,0 0,0">
          <text:p/>
        </draw:polygon>
        <draw:polygon draw:style-name="gr1" draw:text-style-name="P1" draw:layer="layout" svg:width="0.637cm" svg:height="0.637cm" svg:x="19.07cm" svg:y="8.278cm" svg:viewBox="0 0 638 638" draw:points="0,638 638,638 638,0 0,0">
          <text:p/>
        </draw:polygon>
        <draw:frame draw:style-name="gr102" draw:text-style-name="P15" draw:layer="layout" svg:width="0.846cm" svg:height="0.954cm" svg:x="17.756cm" svg:y="8.277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01cm" svg:x="19.087cm" svg:y="8.296cm" svg:viewBox="0 0 601 602" draw:points="0,602 601,602 601,0 0,0">
          <text:p/>
        </draw:polygon>
        <draw:polygon draw:style-name="gr1" draw:text-style-name="P1" draw:layer="layout" svg:width="0.636cm" svg:height="0.637cm" svg:x="16.443cm" svg:y="9.592cm" svg:viewBox="0 0 637 638" draw:points="0,638 637,638 637,0 0,0">
          <text:p/>
        </draw:polygon>
        <draw:polygon draw:style-name="gr101" draw:text-style-name="P2" draw:layer="layout" svg:width="0.601cm" svg:height="0.601cm" svg:x="16.46cm" svg:y="9.609cm" svg:viewBox="0 0 602 602" draw:points="0,602 602,602 602,0 0,0">
          <text:p/>
        </draw:polygon>
        <draw:frame draw:style-name="gr102" draw:text-style-name="P15" draw:layer="layout" svg:width="0.846cm" svg:height="0.954cm" svg:x="19.07cm" svg:y="8.277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7.736cm" svg:y="9.592cm" svg:viewBox="0 0 637 638" draw:points="0,638 637,638 637,0 0,0">
          <text:p/>
        </draw:polygon>
        <draw:polygon draw:style-name="gr101" draw:text-style-name="P2" draw:layer="layout" svg:width="0.602cm" svg:height="0.601cm" svg:x="17.754cm" svg:y="9.609cm" svg:viewBox="0 0 603 602" draw:points="0,602 603,602 603,0 0,0">
          <text:p/>
        </draw:polygon>
        <draw:frame draw:style-name="gr102" draw:text-style-name="P15" draw:layer="layout" svg:width="0.846cm" svg:height="0.954cm" svg:x="16.478cm" svg:y="9.625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9.05cm" svg:y="9.592cm" svg:viewBox="0 0 638 638" draw:points="0,638 638,638 638,0 0,0">
          <text:p/>
        </draw:polygon>
        <draw:frame draw:style-name="gr102" draw:text-style-name="P15" draw:layer="layout" svg:width="0.846cm" svg:height="0.954cm" svg:x="17.772cm" svg:y="9.625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01cm" svg:x="19.067cm" svg:y="9.609cm" svg:viewBox="0 0 602 602" draw:points="0,602 602,602 602,0 0,0">
          <text:p/>
        </draw:polygon>
        <draw:polygon draw:style-name="gr1" draw:text-style-name="P1" draw:layer="layout" svg:width="0.637cm" svg:height="0.637cm" svg:x="16.481cm" svg:y="10.886cm" svg:viewBox="0 0 638 638" draw:points="0,638 638,638 638,0 0,0">
          <text:p/>
        </draw:polygon>
        <draw:frame draw:style-name="gr102" draw:text-style-name="P15" draw:layer="layout" svg:width="0.846cm" svg:height="0.954cm" svg:x="19.051cm" svg:y="9.591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01cm" svg:height="0.6cm" svg:x="16.498cm" svg:y="10.904cm" svg:viewBox="0 0 602 601" draw:points="0,601 602,601 602,0 0,0">
          <text:p/>
        </draw:polygon>
        <draw:polygon draw:style-name="gr1" draw:text-style-name="P1" draw:layer="layout" svg:width="0.636cm" svg:height="0.637cm" svg:x="17.756cm" svg:y="10.924cm" svg:viewBox="0 0 637 638" draw:points="0,638 637,638 637,0 0,0">
          <text:p/>
        </draw:polygon>
        <draw:frame draw:style-name="gr102" draw:text-style-name="P15" draw:layer="layout" svg:width="0.846cm" svg:height="0.954cm" svg:x="16.481cm" svg:y="10.885cm">
          <draw:text-box>
            <text:p text:style-name="P3"><text:span text:style-name="T15">x</text:span></text:p>
          </draw:text-box>
        </draw:frame>
        <draw:polygon draw:style-name="gr101" draw:text-style-name="P2" draw:layer="layout" svg:width="0.6cm" svg:height="0.6cm" svg:x="17.774cm" svg:y="10.942cm" svg:viewBox="0 0 601 601" draw:points="0,601 601,601 601,0 0,0">
          <text:p/>
        </draw:polygon>
        <draw:polygon draw:style-name="gr1" draw:text-style-name="P1" draw:layer="layout" svg:width="0.637cm" svg:height="0.637cm" svg:x="19.05cm" svg:y="10.924cm" svg:viewBox="0 0 638 638" draw:points="0,638 638,638 638,0 0,0">
          <text:p/>
        </draw:polygon>
        <draw:polygon draw:style-name="gr101" draw:text-style-name="P2" draw:layer="layout" svg:width="0.601cm" svg:height="0.6cm" svg:x="19.067cm" svg:y="10.942cm" svg:viewBox="0 0 602 601" draw:points="0,601 602,601 602,0 0,0">
          <text:p/>
        </draw:polygon>
        <draw:frame draw:style-name="gr102" draw:text-style-name="P15" draw:layer="layout" svg:width="0.846cm" svg:height="0.954cm" svg:x="17.756cm" svg:y="10.923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6.5cm" svg:y="12.085cm" svg:viewBox="0 0 637 638" draw:points="0,638 637,638 637,0 0,0">
          <text:p/>
        </draw:polygon>
        <draw:polygon draw:style-name="gr101" draw:text-style-name="P2" draw:layer="layout" svg:width="0.601cm" svg:height="0.6cm" svg:x="16.518cm" svg:y="12.103cm" svg:viewBox="0 0 602 601" draw:points="0,601 602,601 602,0 0,0">
          <text:p/>
        </draw:polygon>
        <draw:polygon draw:style-name="gr1" draw:text-style-name="P1" draw:layer="layout" svg:width="0.636cm" svg:height="0.637cm" svg:x="17.814cm" svg:y="12.085cm" svg:viewBox="0 0 637 638" draw:points="0,638 637,638 637,0 0,0">
          <text:p/>
        </draw:polygon>
        <draw:polygon draw:style-name="gr101" draw:text-style-name="P2" draw:layer="layout" svg:width="0.601cm" svg:height="0.6cm" svg:x="17.831cm" svg:y="12.103cm" svg:viewBox="0 0 602 601" draw:points="0,601 602,601 602,0 0,0">
          <text:p/>
        </draw:polygon>
        <draw:polygon draw:style-name="gr1" draw:text-style-name="P1" draw:layer="layout" svg:width="0.636cm" svg:height="0.637cm" svg:x="19.032cm" svg:y="12.123cm" svg:viewBox="0 0 637 638" draw:points="0,638 637,638 637,0 0,0">
          <text:p/>
        </draw:polygon>
        <draw:polygon draw:style-name="gr101" draw:text-style-name="P2" draw:layer="layout" svg:width="0.601cm" svg:height="0.6cm" svg:x="19.049cm" svg:y="12.141cm" svg:viewBox="0 0 602 601" draw:points="0,601 602,601 602,0 0,0">
          <text:p/>
        </draw:polygon>
        <draw:polygon draw:style-name="gr1" draw:text-style-name="P1" draw:layer="layout" svg:width="0.329cm" svg:height="0.339cm" svg:x="2.914cm" svg:y="11.173cm" svg:viewBox="0 0 330 340" draw:points="0,340 330,340 330,0 0,0">
          <text:p/>
        </draw:polygon>
        <draw:polygon draw:style-name="gr101" draw:text-style-name="P2" draw:layer="layout" svg:width="0.292cm" svg:height="0.304cm" svg:x="2.932cm" svg:y="11.191cm" svg:viewBox="0 0 293 305" draw:points="0,305 293,305 293,0 0,0">
          <text:p/>
        </draw:polygon>
        <draw:polygon draw:style-name="gr1" draw:text-style-name="P1" draw:layer="layout" svg:width="0.329cm" svg:height="0.339cm" svg:x="3.21cm" svg:y="11.173cm" svg:viewBox="0 0 330 340" draw:points="0,340 330,340 330,0 0,0">
          <text:p/>
        </draw:polygon>
        <draw:polygon draw:style-name="gr101" draw:text-style-name="P2" draw:layer="layout" svg:width="0.292cm" svg:height="0.304cm" svg:x="3.229cm" svg:y="11.191cm" svg:viewBox="0 0 293 305" draw:points="0,305 293,305 293,0 0,0">
          <text:p/>
        </draw:polygon>
        <draw:polygon draw:style-name="gr1" draw:text-style-name="P1" draw:layer="layout" svg:width="0.329cm" svg:height="0.339cm" svg:x="3.524cm" svg:y="11.173cm" svg:viewBox="0 0 330 340" draw:points="0,340 330,340 330,0 0,0">
          <text:p/>
        </draw:polygon>
        <draw:polygon draw:style-name="gr101" draw:text-style-name="P2" draw:layer="layout" svg:width="0.294cm" svg:height="0.304cm" svg:x="3.541cm" svg:y="11.191cm" svg:viewBox="0 0 295 305" draw:points="0,305 295,305 295,0 0,0">
          <text:p/>
        </draw:polygon>
        <draw:polygon draw:style-name="gr1" draw:text-style-name="P1" draw:layer="layout" svg:width="0.329cm" svg:height="0.339cm" svg:x="3.836cm" svg:y="11.173cm" svg:viewBox="0 0 330 340" draw:points="0,340 330,340 330,0 0,0">
          <text:p/>
        </draw:polygon>
        <draw:polygon draw:style-name="gr101" draw:text-style-name="P2" draw:layer="layout" svg:width="0.294cm" svg:height="0.304cm" svg:x="3.853cm" svg:y="11.191cm" svg:viewBox="0 0 295 305" draw:points="0,305 295,305 295,0 0,0">
          <text:p/>
        </draw:polygon>
        <draw:polygon draw:style-name="gr1" draw:text-style-name="P1" draw:layer="layout" svg:width="0.329cm" svg:height="0.339cm" svg:x="4.15cm" svg:y="11.173cm" svg:viewBox="0 0 330 340" draw:points="0,340 330,340 330,0 0,0">
          <text:p/>
        </draw:polygon>
        <draw:polygon draw:style-name="gr101" draw:text-style-name="P2" draw:layer="layout" svg:width="0.294cm" svg:height="0.304cm" svg:x="4.167cm" svg:y="11.191cm" svg:viewBox="0 0 295 305" draw:points="0,305 295,305 295,0 0,0">
          <text:p/>
        </draw:polygon>
        <draw:polygon draw:style-name="gr1" draw:text-style-name="P1" draw:layer="layout" svg:width="0.329cm" svg:height="0.339cm" svg:x="4.462cm" svg:y="11.173cm" svg:viewBox="0 0 330 340" draw:points="0,340 330,340 330,0 0,0">
          <text:p/>
        </draw:polygon>
        <draw:polygon draw:style-name="gr101" draw:text-style-name="P2" draw:layer="layout" svg:width="0.295cm" svg:height="0.304cm" svg:x="4.479cm" svg:y="11.191cm" svg:viewBox="0 0 296 305" draw:points="0,305 296,305 296,0 0,0">
          <text:p/>
        </draw:polygon>
        <draw:polygon draw:style-name="gr1" draw:text-style-name="P1" draw:layer="layout" svg:width="0.327cm" svg:height="0.339cm" svg:x="4.776cm" svg:y="11.173cm" svg:viewBox="0 0 328 340" draw:points="0,340 328,340 328,0 0,0">
          <text:p/>
        </draw:polygon>
        <draw:polygon draw:style-name="gr101" draw:text-style-name="P2" draw:layer="layout" svg:width="0.293cm" svg:height="0.304cm" svg:x="4.793cm" svg:y="11.191cm" svg:viewBox="0 0 294 305" draw:points="0,305 294,305 294,0 0,0">
          <text:p/>
        </draw:polygon>
        <draw:polygon draw:style-name="gr1" draw:text-style-name="P1" draw:layer="layout" svg:width="0.328cm" svg:height="0.339cm" svg:x="5.089cm" svg:y="11.173cm" svg:viewBox="0 0 329 340" draw:points="0,340 329,340 329,0 0,0">
          <text:p/>
        </draw:polygon>
        <draw:polygon draw:style-name="gr101" draw:text-style-name="P2" draw:layer="layout" svg:width="0.294cm" svg:height="0.304cm" svg:x="5.106cm" svg:y="11.191cm" svg:viewBox="0 0 295 305" draw:points="0,305 295,305 295,0 0,0">
          <text:p/>
        </draw:polygon>
        <draw:frame draw:style-name="gr102" draw:text-style-name="P15" draw:layer="layout" svg:width="0.846cm" svg:height="0.954cm" svg:x="19.085cm" svg:y="10.958cm">
          <draw:text-box>
            <text:p text:style-name="P3"><text:span text:style-name="T15">x</text:span></text:p>
          </draw:text-box>
        </draw:frame>
        <draw:frame draw:style-name="gr103" draw:text-style-name="P4" draw:layer="layout" svg:width="0.472cm" svg:height="0.319cm" svg:x="8.5cm" svg:y="4.638cm">
          <draw:text-box>
            <text:p text:style-name="P3"><text:span text:style-name="T12">140</text:span></text:p>
          </draw:text-box>
        </draw:frame>
        <draw:frame draw:style-name="gr104" draw:text-style-name="P16" draw:layer="layout" svg:width="2.017cm" svg:height="0.399cm" svg:x="4.75cm" svg:y="3.601cm">
          <draw:text-box>
            <text:p><text:span text:style-name="T16">Такода Часка</text:span></text:p>
          </draw:text-box>
        </draw:frame>
        <draw:frame draw:style-name="gr105" draw:text-style-name="P16" draw:layer="layout" svg:width="3.241cm" svg:height="0.399cm" svg:x="14.983cm" svg:y="0.851cm">
          <draw:text-box>
            <text:p><text:span text:style-name="T16">Такода Часка (Боров)</text:span></text:p>
          </draw:text-box>
        </draw:frame>
        <draw:frame draw:style-name="gr106" draw:text-style-name="P17" draw:layer="layout" svg:width="9.396cm" svg:height="2.255cm" svg:x="11.413cm" svg:y="23.451cm">
          <draw:text-box>
            <text:p><text:span text:style-name="T17">Боб Рассел(3/3): Американец, менеджер/диспетчер из корпы, </text:span></text:p>
            <text:p><text:span text:style-name="T17">в которой работал Такода, с относительно хорошими </text:span></text:p>
            <text:p><text:span text:style-name="T17">Подпольными связями.</text:span></text:p>
            <text:p><text:span text:style-name="T17">Один из немногих, кто до последнего держал хорошие связи с Такодой.</text:span></text:p>
            <text:p><text:span text:style-name="T17">Чуть позже сам тоже ливнул из корпы и устроился в другом месте, </text:span></text:p>
            <text:p><text:span text:style-name="T17">сохранив контакты.</text:span></text:p>
          </draw:text-box>
        </draw:frame>
        <draw:frame draw:style-name="gr107" draw:text-style-name="P16" draw:layer="layout" svg:width="0.599cm" svg:height="0.5cm" svg:x="4.901cm" svg:y="5.5cm">
          <draw:text-box>
            <text:p><text:span text:style-name="T16">109</text:span></text:p>
          </draw:text-box>
        </draw:frame>
        <draw:frame draw:style-name="gr108" draw:text-style-name="P18" draw:layer="layout" svg:width="9.923cm" svg:height="3.817cm" svg:x="11.577cm" svg:y="17.933cm">
          <draw:text-box>
            <text:p text:style-name="P3"><text:span text:style-name="T18">Технарь (-10 кармы), Стрессовое расстройство (+8 к)</text:span></text:p>
            <text:p text:style-name="P3"><text:span text:style-name="T18"/></text:p>
            <text:p text:style-name="P3"><text:span text:style-name="T18">Черты по машинкам: Gateway Driver (-10 K), Driving Style: Stunt Driver (-9 K), Junkyard King (-8 K), The Motorpool (-6 K), Underdog(-7k), Signature move (-4 karma),Road Rage (+7 k)</text:span></text:p>
            <text:p text:style-name="P3"><text:span text:style-name="T18"/></text:p>
            <text:p text:style-name="P3"><text:span text:style-name="T18">Кач характеристик +1 — новый уровень х 5 кармы</text:span></text:p>
            <text:p text:style-name="P3"><text:span text:style-name="T18">Кач харизмы на 1 — 10к</text:span></text:p>
            <text:p text:style-name="P3"><text:span text:style-name="T18">Кач харизмы на 2 — 15к.</text:span></text:p>
            <text:p text:style-name="P3"><text:span text:style-name="T18"/></text:p>
            <text:p text:style-name="P3"><text:span text:style-name="T18">Эксперт -5, Эксперт -5, Мастер -5,</text:span></text:p>
            <text:p text:style-name="P3"><text:span text:style-name="T18"/></text:p>
            <text:p text:style-name="P3"><text:span text:style-name="T18">Остаток 1 кармы.</text:span></text:p>
          </draw:text-box>
        </draw:frame>
        <draw:frame draw:style-name="gr109" draw:text-style-name="P16" draw:layer="layout" svg:width="0.599cm" svg:height="0.779cm" svg:x="2.5cm" svg:y="5.5cm">
          <draw:text-box>
            <text:p><text:span text:style-name="T16">10</text:span></text:p>
          </draw:text-box>
        </draw:frame>
        <draw:frame draw:style-name="gr107" draw:text-style-name="P16" draw:layer="layout" svg:width="2.06cm" svg:height="0.5cm" svg:x="7.94cm" svg:y="7cm">
          <draw:text-box>
            <text:p><text:span text:style-name="T16">0.6+1.7 = 2.3</text:span></text:p>
          </draw:text-box>
        </draw:frame>
        <draw:frame draw:style-name="gr110" draw:text-style-name="P16" draw:layer="layout" svg:width="3.909cm" svg:height="0.399cm" svg:x="2.5cm" svg:y="23.25cm">
          <draw:text-box>
            <text:p><text:span text:style-name="T16">Остаток: 34 222</text:span></text:p>
          </draw:text-box>
        </draw:frame>
        <draw:frame draw:style-name="gr111" draw:text-style-name="P16" draw:layer="layout" svg:width="2.25cm" svg:height="0.5cm" svg:x="8cm" svg:y="8cm">
          <draw:text-box>
            <text:p><text:span text:style-name="T16">4+3=7</text:span></text:p>
          </draw:text-box>
        </draw:frame>
        <draw:frame draw:style-name="gr111" draw:text-style-name="P16" draw:layer="layout" svg:width="1cm" svg:height="0.5cm" svg:x="8cm" svg:y="10.25cm">
          <draw:text-box>
            <text:p><text:span text:style-name="T16">3+3=6</text:span></text:p>
          </draw:text-box>
        </draw:frame>
        <draw:frame draw:style-name="gr112" draw:text-style-name="P16" draw:layer="layout" svg:width="2cm" svg:height="0.39cm" svg:x="8cm" svg:y="11.11cm">
          <draw:text-box>
            <text:p><text:span text:style-name="T16">5/10/15+d6</text:span></text:p>
          </draw:text-box>
        </draw:frame>
      </draw:page>
      <draw:page draw:name="page2" draw:style-name="dp1" draw:master-page-name="master-page3">
        <draw:frame draw:style-name="gr2" draw:text-style-name="P19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/>
          </draw:image>
        </draw:frame>
        <draw:polygon draw:style-name="gr113" draw:text-style-name="P20" draw:layer="layout" svg:width="9.249cm" svg:height="7.749cm" svg:x="0.75cm" svg:y="18cm" svg:viewBox="0 0 9250 7750" draw:points="0,0 9250,0 9250,7750 0,7750">
          <text:p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><text:span text:style-name="T16"><text:tab/></text:span></text:p>
          <text:p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  <text:p><text:span text:style-name="T16">Книга по инженер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</text:span></text:p>
          <text:p><text:span text:style-name="T16">Ford Intercepto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2000</text:span></text:p>
          <text:p><text:span text:style-name="T16">+ящик сгухи -1 банка</text:span></text:p>
          <text:p><text:span text:style-name="T16">Боевой деловой костюм</text:span></text:p>
          <text:p><text:span text:style-name="T16">РПУ Рейт 5 мощ 5 сет 6 <text:s/>структ 10 Протеус Посейдон <text:s/>70000</text:span></text:p>
          <text:p><text:span text:style-name="T16"/></text:p>
        </draw:polygon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4.548cm" svg:x="11.112cm" svg:y="6.851cm" svg:viewBox="0 0 10798 4549" svg:d="M422 0c0 0-422 0-422 423v3700c0 0 0 426 422 426h10376v-4549z">
          <text:p/>
        </draw:path>
        <draw:frame draw:style-name="gr114" draw:text-style-name="P7" draw:layer="layout" svg:width="3.583cm" svg:height="0.53cm" svg:x="11.527cm" svg:y="3.363cm">
          <draw:text-box>
            <text:p text:style-name="P3"><text:span text:style-name="T4">melee weapons</text:span></text:p>
          </draw:text-box>
        </draw:frame>
        <draw:path draw:style-name="gr7" draw:text-style-name="P2" draw:layer="layout" svg:width="10.797cm" svg:height="3.837cm" svg:x="11.112cm" svg:y="11.753cm" svg:viewBox="0 0 10798 3838" svg:d="M422 0c0 0-422 0-422 424v2990c0 0 0 424 422 424h10376v-3838z">
          <text:p/>
        </draw:path>
        <draw:frame draw:style-name="gr115" draw:text-style-name="P7" draw:layer="layout" svg:width="2.741cm" svg:height="0.53cm" svg:x="11.527cm" svg:y="6.909cm">
          <draw:text-box>
            <text:p text:style-name="P3"><text:span text:style-name="T4">matrix stats</text:span></text:p>
          </draw:text-box>
        </draw:frame>
        <draw:frame draw:style-name="gr116" draw:text-style-name="P7" draw:layer="layout" svg:width="1.623cm" svg:height="0.53cm" svg:x="11.527cm" svg:y="11.811cm">
          <draw:text-box>
            <text:p text:style-name="P3"><text:span text:style-name="T4">vehicle</text:span></text:p>
          </draw:text-box>
        </draw:frame>
        <draw:path draw:style-name="gr7" draw:text-style-name="P2" draw:layer="layout" svg:width="10.797cm" svg:height="4.989cm" svg:x="11.112cm" svg:y="15.977cm" svg:viewBox="0 0 10798 4990" svg:d="M422 0c0 0-422 0-422 423v4144c0 0 0 423 422 423h10376v-4990z">
          <text:p/>
        </draw:path>
        <draw:frame draw:style-name="gr117" draw:text-style-name="P7" draw:layer="layout" svg:width="5.607cm" svg:height="0.53cm" svg:x="11.527cm" svg:y="16.035cm">
          <draw:text-box>
            <text:p text:style-name="P3"><text:span text:style-name="T4">SPELLS / PREPARATIONS</text:span></text:p>
          </draw:text-box>
        </draw:frame>
        <draw:path draw:style-name="gr7" draw:text-style-name="P2" draw:layer="layout" svg:width="10.797cm" svg:height="4.597cm" svg:x="11.112cm" svg:y="21.305cm" svg:viewBox="0 0 10798 4598" svg:d="M422 0c0 0-422 0-422 423v3752c0 0 0 423 422 423h10376v-4598z">
          <text:p/>
        </draw:path>
        <draw:frame draw:style-name="gr118" draw:text-style-name="P7" draw:layer="layout" svg:width="6.339cm" svg:height="0.53cm" svg:x="11.534cm" svg:y="16.476cm">
          <draw:text-box>
            <text:p text:style-name="P3"><text:span text:style-name="T4">RITUALS / COMPLEX FORMS</text:span></text:p>
          </draw:text-box>
        </draw:frame>
        <draw:path draw:style-name="gr7" draw:text-style-name="P2" draw:layer="layout" svg:width="10.797cm" svg:height="3.444cm" svg:x="-0.318cm" svg:y="3.305cm" svg:viewBox="0 0 10798 3445" svg:d="M0 0v3445h10375c0 0 423 0 423-482v-2481c0 0 0-482-423-482z">
          <text:p/>
        </draw:path>
        <draw:frame draw:style-name="gr119" draw:text-style-name="P7" draw:layer="layout" svg:width="8.481cm" svg:height="0.53cm" svg:x="11.527cm" svg:y="21.363cm">
          <draw:text-box>
            <text:p text:style-name="P3"><text:span text:style-name="T4">ADEPT POWERS OR OTHER ABILITIES</text:span></text:p>
          </draw:text-box>
        </draw:frame>
        <draw:path draw:style-name="gr7" draw:text-style-name="P2" draw:layer="layout" svg:width="10.797cm" svg:height="4.548cm" svg:x="-0.318cm" svg:y="6.851cm" svg:viewBox="0 0 10798 4549" svg:d="M0 0v4549h10375c0 0 423 0 423-426v-3700c0 0 0-423-423-423z">
          <text:p/>
        </draw:path>
        <draw:frame draw:style-name="gr120" draw:text-style-name="P7" draw:layer="layout" svg:width="3.791cm" svg:height="0.53cm" svg:x="1.12cm" svg:y="3.363cm">
          <draw:text-box>
            <text:p text:style-name="P3"><text:span text:style-name="T4">ranged weapons</text:span></text:p>
          </draw:text-box>
        </draw:frame>
        <draw:path draw:style-name="gr7" draw:text-style-name="P2" draw:layer="layout" svg:width="10.797cm" svg:height="4.548cm" svg:x="-0.318cm" svg:y="11.753cm" svg:viewBox="0 0 10798 4549" svg:d="M0 0v4549h10375c0 0 423 0 423-425v-3700c0 0 0-424-423-424z">
          <text:p/>
        </draw:path>
        <draw:frame draw:style-name="gr121" draw:text-style-name="P7" draw:layer="layout" svg:width="1.378cm" svg:height="0.53cm" svg:x="1.12cm" svg:y="6.909cm">
          <draw:text-box>
            <text:p text:style-name="P3"><text:span text:style-name="T4">armor</text:span></text:p>
          </draw:text-box>
        </draw:frame>
        <draw:path draw:style-name="gr7" draw:text-style-name="P2" draw:layer="layout" svg:width="10.797cm" svg:height="9.217cm" svg:x="-0.318cm" svg:y="16.685cm" svg:viewBox="0 0 10798 9218" svg:d="M0 0v9218h10375c0 0 423 0 423-423v-8371c0 0 0-424-423-424z">
          <text:p/>
        </draw:path>
        <draw:frame draw:style-name="gr122" draw:text-style-name="P7" draw:layer="layout" svg:width="3.439cm" svg:height="0.53cm" svg:x="1.12cm" svg:y="11.811cm">
          <draw:text-box>
            <text:p text:style-name="P3"><text:span text:style-name="T4">augmentations</text:span></text:p>
          </draw:text-box>
        </draw:frame>
        <draw:frame draw:style-name="gr123" draw:text-style-name="P7" draw:layer="layout" svg:width="1.039cm" svg:height="0.53cm" svg:x="1.12cm" svg:y="16.743cm">
          <draw:text-box>
            <text:p text:style-name="P3"><text:span text:style-name="T4">gear</text:span></text:p>
          </draw:text-box>
        </draw:frame>
        <draw:frame draw:style-name="gr124" draw:text-style-name="P8" draw:layer="layout" svg:width="0.878cm" svg:height="0.298cm" svg:x="1.534cm" svg:y="3.952cm">
          <draw:text-box>
            <text:p text:style-name="P3"><text:span text:style-name="T5">Weapon</text:span></text:p>
          </draw:text-box>
        </draw:frame>
        <draw:frame draw:style-name="gr125" draw:text-style-name="P8" draw:layer="layout" svg:width="0.307cm" svg:height="0.298cm" svg:x="3.754cm" svg:y="3.952cm">
          <draw:text-box>
            <text:p text:style-name="P3"><text:span text:style-name="T5">DV</text:span></text:p>
          </draw:text-box>
        </draw:frame>
        <draw:frame draw:style-name="gr126" draw:text-style-name="P8" draw:layer="layout" svg:width="0.59cm" svg:height="0.298cm" svg:x="4.587cm" svg:y="3.952cm">
          <draw:text-box>
            <text:p text:style-name="P3"><text:span text:style-name="T5">Mode</text:span></text:p>
          </draw:text-box>
        </draw:frame>
        <draw:frame draw:style-name="gr127" draw:text-style-name="P8" draw:layer="layout" svg:width="0.62cm" svg:height="0.298cm" svg:x="5.548cm" svg:y="3.952cm">
          <draw:text-box>
            <text:p text:style-name="P3"><text:span text:style-name="T5">Close</text:span></text:p>
          </draw:text-box>
        </draw:frame>
        <draw:frame draw:style-name="gr24" draw:text-style-name="P8" draw:layer="layout" svg:width="0.544cm" svg:height="0.298cm" svg:x="6.519cm" svg:y="3.952cm">
          <draw:text-box>
            <text:p text:style-name="P3"><text:span text:style-name="T5">Near</text:span></text:p>
          </draw:text-box>
        </draw:frame>
        <draw:frame draw:style-name="gr128" draw:text-style-name="P8" draw:layer="layout" svg:width="0.375cm" svg:height="0.298cm" svg:x="7.536cm" svg:y="3.952cm">
          <draw:text-box>
            <text:p text:style-name="P3"><text:span text:style-name="T5">Far</text:span></text:p>
          </draw:text-box>
        </draw:frame>
        <draw:frame draw:style-name="gr129" draw:text-style-name="P8" draw:layer="layout" svg:width="0.938cm" svg:height="0.298cm" svg:x="8.263cm" svg:y="3.952cm">
          <draw:text-box>
            <text:p text:style-name="P3"><text:span text:style-name="T5">Extreme</text:span></text:p>
          </draw:text-box>
        </draw:frame>
        <draw:frame draw:style-name="gr130" draw:text-style-name="P8" draw:layer="layout" svg:width="0.722cm" svg:height="0.298cm" svg:x="9.3cm" svg:y="3.952cm">
          <draw:text-box>
            <text:p text:style-name="P3"><text:span text:style-name="T5">Ammo</text:span></text:p>
          </draw:text-box>
        </draw:frame>
        <draw:frame draw:style-name="gr124" draw:text-style-name="P8" draw:layer="layout" svg:width="0.878cm" svg:height="0.298cm" svg:x="11.712cm" svg:y="3.952cm">
          <draw:text-box>
            <text:p text:style-name="P3"><text:span text:style-name="T8">Weapon</text:span></text:p>
          </draw:text-box>
        </draw:frame>
        <draw:frame draw:style-name="gr125" draw:text-style-name="P8" draw:layer="layout" svg:width="0.307cm" svg:height="0.298cm" svg:x="16.48cm" svg:y="3.952cm">
          <draw:text-box>
            <text:p text:style-name="P3"><text:span text:style-name="T8">DV</text:span></text:p>
          </draw:text-box>
        </draw:frame>
        <draw:frame draw:style-name="gr127" draw:text-style-name="P8" draw:layer="layout" svg:width="0.62cm" svg:height="0.298cm" svg:x="18.794cm" svg:y="3.952cm">
          <draw:text-box>
            <text:p text:style-name="P3"><text:span text:style-name="T8">Close</text:span></text:p>
          </draw:text-box>
        </draw:frame>
        <draw:frame draw:style-name="gr64" draw:text-style-name="P8" draw:layer="layout" svg:width="0.709cm" svg:height="0.298cm" svg:x="11.712cm" svg:y="7.646cm">
          <draw:text-box>
            <text:p text:style-name="P3"><text:span text:style-name="T5">Attack</text:span></text:p>
          </draw:text-box>
        </draw:frame>
        <draw:frame draw:style-name="gr131" draw:text-style-name="P8" draw:layer="layout" svg:width="0.743cm" svg:height="0.298cm" svg:x="13.843cm" svg:y="7.646cm">
          <draw:text-box>
            <text:p text:style-name="P3"><text:span text:style-name="T5">Sleaze</text:span></text:p>
          </draw:text-box>
        </draw:frame>
        <draw:frame draw:style-name="gr132" draw:text-style-name="P8" draw:layer="layout" svg:width="1.145cm" svg:height="0.298cm" svg:x="15.973cm" svg:y="7.646cm">
          <draw:text-box>
            <text:p text:style-name="P3"><text:span text:style-name="T5">Data Proc.</text:span></text:p>
          </draw:text-box>
        </draw:frame>
        <draw:frame draw:style-name="gr133" draw:text-style-name="P8" draw:layer="layout" svg:width="0.904cm" svg:height="0.298cm" svg:x="18.103cm" svg:y="7.646cm">
          <draw:text-box>
            <text:p text:style-name="P3"><text:span text:style-name="T5">Firewall</text:span></text:p>
          </draw:text-box>
        </draw:frame>
        <draw:frame draw:style-name="gr88" draw:text-style-name="P8" draw:layer="layout" svg:width="0.65cm" svg:height="0.298cm" svg:x="11.712cm" svg:y="22.005cm">
          <draw:text-box>
            <text:p text:style-name="P3"><text:span text:style-name="T5">Name</text:span></text:p>
          </draw:text-box>
        </draw:frame>
        <draw:frame draw:style-name="gr134" draw:text-style-name="P8" draw:layer="layout" svg:width="0.599cm" svg:height="0.298cm" svg:x="16.126cm" svg:y="22.005cm">
          <draw:text-box>
            <text:p text:style-name="P3"><text:span text:style-name="T5">Level</text:span></text:p>
          </draw:text-box>
        </draw:frame>
        <draw:frame draw:style-name="gr88" draw:text-style-name="P8" draw:layer="layout" svg:width="0.65cm" svg:height="0.298cm" svg:x="19.189cm" svg:y="22.005cm">
          <draw:text-box>
            <text:p text:style-name="P3"><text:span text:style-name="T5">Notes</text:span></text:p>
          </draw:text-box>
        </draw:frame>
        <draw:frame draw:style-name="gr135" draw:text-style-name="P8" draw:layer="layout" svg:width="1.035cm" svg:height="0.298cm" svg:x="11.712cm" svg:y="17.137cm">
          <draw:text-box>
            <text:p text:style-name="P3"><text:span text:style-name="T5">S/P/R/CF</text:span></text:p>
          </draw:text-box>
        </draw:frame>
        <draw:frame draw:style-name="gr136" draw:text-style-name="P8" draw:layer="layout" svg:width="1.297cm" svg:height="0.298cm" svg:x="13.733cm" svg:y="17.137cm">
          <draw:text-box>
            <text:p text:style-name="P3"><text:span text:style-name="T5">Type/Target</text:span></text:p>
          </draw:text-box>
        </draw:frame>
        <draw:frame draw:style-name="gr30" draw:text-style-name="P8" draw:layer="layout" svg:width="0.692cm" svg:height="0.298cm" svg:x="15.701cm" svg:y="17.137cm">
          <draw:text-box>
            <text:p text:style-name="P3"><text:span text:style-name="T5">Range</text:span></text:p>
          </draw:text-box>
        </draw:frame>
        <draw:line draw:style-name="gr15" draw:text-style-name="P2" draw:layer="layout" svg:x1="10.056cm" svg:y1="4.326cm" svg:x2="1.533cm" svg:y2="4.326cm">
          <text:p/>
        </draw:line>
        <draw:line draw:style-name="gr15" draw:text-style-name="P2" draw:layer="layout" svg:x1="20.233cm" svg:y1="4.326cm" svg:x2="11.712cm" svg:y2="4.326cm">
          <text:p/>
        </draw:line>
        <draw:line draw:style-name="gr15" draw:text-style-name="P2" draw:layer="layout" svg:x1="20.233cm" svg:y1="22.379cm" svg:x2="11.712cm" svg:y2="22.379cm">
          <text:p/>
        </draw:line>
        <draw:line draw:style-name="gr15" draw:text-style-name="P2" draw:layer="layout" svg:x1="20.233cm" svg:y1="17.511cm" svg:x2="11.712cm" svg:y2="17.511cm">
          <text:p/>
        </draw:line>
        <draw:frame draw:style-name="gr66" draw:text-style-name="P8" draw:layer="layout" svg:width="0.95cm" svg:height="0.298cm" svg:x="17.29cm" svg:y="17.137cm">
          <draw:text-box>
            <text:p text:style-name="P3"><text:span text:style-name="T5">Duration</text:span></text:p>
          </draw:text-box>
        </draw:frame>
        <draw:frame draw:style-name="gr134" draw:text-style-name="P8" draw:layer="layout" svg:width="0.599cm" svg:height="0.298cm" svg:x="19.139cm" svg:y="17.137cm">
          <draw:text-box>
            <text:p text:style-name="P3"><text:span text:style-name="T5">Drain</text:span></text:p>
          </draw:text-box>
        </draw:frame>
        <draw:frame draw:style-name="gr137" draw:text-style-name="P8" draw:layer="layout" svg:width="0.802cm" svg:height="0.298cm" svg:x="11.712cm" svg:y="12.594cm">
          <draw:text-box>
            <text:p text:style-name="P3"><text:span text:style-name="T5">Vehicle</text:span></text:p>
          </draw:text-box>
        </draw:frame>
        <draw:frame draw:style-name="gr138" draw:text-style-name="P8" draw:layer="layout" svg:width="0.967cm" svg:height="0.298cm" svg:x="15.621cm" svg:y="12.594cm">
          <draw:text-box>
            <text:p text:style-name="P3"><text:span text:style-name="T5">Handling</text:span></text:p>
          </draw:text-box>
        </draw:frame>
        <draw:frame draw:style-name="gr139" draw:text-style-name="P8" draw:layer="layout" svg:width="1.395cm" svg:height="0.298cm" svg:x="11.712cm" svg:y="13.064cm">
          <draw:text-box>
            <text:p text:style-name="P3"><text:span text:style-name="T5">Acceleration</text:span></text:p>
          </draw:text-box>
        </draw:frame>
        <draw:frame draw:style-name="gr140" draw:text-style-name="P8" draw:layer="layout" svg:width="1.598cm" svg:height="0.298cm" svg:x="15.136cm" svg:y="13.064cm">
          <draw:text-box>
            <text:p text:style-name="P3"><text:span text:style-name="T5">Speed Interval</text:span></text:p>
          </draw:text-box>
        </draw:frame>
        <draw:frame draw:style-name="gr48" draw:text-style-name="P8" draw:layer="layout" svg:width="1.141cm" svg:height="0.298cm" svg:x="11.712cm" svg:y="13.508cm">
          <draw:text-box>
            <text:p text:style-name="P3"><text:span text:style-name="T5">Top Speed</text:span></text:p>
          </draw:text-box>
        </draw:frame>
        <draw:frame draw:style-name="gr24" draw:text-style-name="P8" draw:layer="layout" svg:width="0.544cm" svg:height="0.298cm" svg:x="15.964cm" svg:y="13.508cm">
          <draw:text-box>
            <text:p text:style-name="P3"><text:span text:style-name="T5">Body</text:span></text:p>
          </draw:text-box>
        </draw:frame>
        <draw:frame draw:style-name="gr61" draw:text-style-name="P8" draw:layer="layout" svg:width="0.506cm" svg:height="0.298cm" svg:x="15.989cm" svg:y="13.965cm">
          <draw:text-box>
            <text:p text:style-name="P3"><text:span text:style-name="T5">Pilot</text:span></text:p>
          </draw:text-box>
        </draw:frame>
        <draw:frame draw:style-name="gr130" draw:text-style-name="P8" draw:layer="layout" svg:width="0.722cm" svg:height="0.298cm" svg:x="11.712cm" svg:y="13.965cm">
          <draw:text-box>
            <text:p text:style-name="P3"><text:span text:style-name="T5">Armor</text:span></text:p>
          </draw:text-box>
        </draw:frame>
        <draw:line draw:style-name="gr15" draw:text-style-name="P2" draw:layer="layout" svg:x1="20.233cm" svg:y1="12.904cm" svg:x2="11.712cm" svg:y2="12.904cm">
          <text:p/>
        </draw:line>
        <draw:line draw:style-name="gr15" draw:text-style-name="P2" draw:layer="layout" svg:x1="20.233cm" svg:y1="13.361cm" svg:x2="11.712cm" svg:y2="13.361cm">
          <text:p/>
        </draw:line>
        <draw:line draw:style-name="gr15" draw:text-style-name="P2" draw:layer="layout" svg:x1="20.233cm" svg:y1="13.818cm" svg:x2="11.712cm" svg:y2="13.818cm">
          <text:p/>
        </draw:line>
        <draw:line draw:style-name="gr15" draw:text-style-name="P2" draw:layer="layout" svg:x1="20.233cm" svg:y1="14.275cm" svg:x2="11.712cm" svg:y2="14.275cm">
          <text:p/>
        </draw:line>
        <draw:line draw:style-name="gr15" draw:text-style-name="P2" draw:layer="layout" svg:x1="20.233cm" svg:y1="14.732cm" svg:x2="11.712cm" svg:y2="14.732cm">
          <text:p/>
        </draw:line>
        <draw:line draw:style-name="gr15" draw:text-style-name="P2" draw:layer="layout" svg:x1="20.233cm" svg:y1="15.19cm" svg:x2="11.712cm" svg:y2="15.19cm">
          <text:p/>
        </draw:line>
        <draw:frame draw:style-name="gr141" draw:text-style-name="P8" draw:layer="layout" svg:width="0.789cm" svg:height="0.298cm" svg:x="11.712cm" svg:y="14.436cm">
          <draw:text-box>
            <text:p text:style-name="P3"><text:span text:style-name="T5">Sensor</text:span></text:p>
          </draw:text-box>
        </draw:frame>
        <draw:frame draw:style-name="gr88" draw:text-style-name="P8" draw:layer="layout" svg:width="0.65cm" svg:height="0.298cm" svg:x="11.712cm" svg:y="14.883cm">
          <draw:text-box>
            <text:p text:style-name="P3"><text:span text:style-name="T5">Notes</text:span></text:p>
          </draw:text-box>
        </draw:frame>
        <draw:frame draw:style-name="gr142" draw:text-style-name="P8" draw:layer="layout" svg:width="1.534cm" svg:height="0.298cm" svg:x="1.534cm" svg:y="12.53cm">
          <draw:text-box>
            <text:p text:style-name="P3"><text:span text:style-name="T5">Augmentation</text:span></text:p>
          </draw:text-box>
        </draw:frame>
        <draw:frame draw:style-name="gr143" draw:text-style-name="P8" draw:layer="layout" svg:width="0.705cm" svg:height="0.298cm" svg:x="4.444cm" svg:y="12.53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6.612cm" svg:y="12.53cm">
          <draw:text-box>
            <text:p text:style-name="P3"><text:span text:style-name="T5">Notes</text:span></text:p>
          </draw:text-box>
        </draw:frame>
        <draw:frame draw:style-name="gr25" draw:text-style-name="P8" draw:layer="layout" svg:width="0.925cm" svg:height="0.298cm" svg:x="8.65cm" svg:y="12.53cm">
          <draw:text-box>
            <text:p text:style-name="P3"><text:span text:style-name="T5">Essence</text:span></text:p>
          </draw:text-box>
        </draw:frame>
        <draw:line draw:style-name="gr15" draw:text-style-name="P2" draw:layer="layout" svg:x1="10.056cm" svg:y1="12.904cm" svg:x2="1.533cm" svg:y2="12.904cm">
          <text:p/>
        </draw:line>
        <draw:line draw:style-name="gr15" draw:text-style-name="P2" draw:layer="layout" svg:x1="10.056cm" svg:y1="17.723cm" svg:x2="1.533cm" svg:y2="17.723cm">
          <text:p/>
        </draw:line>
        <draw:frame draw:style-name="gr144" draw:text-style-name="P8" draw:layer="layout" svg:width="0.493cm" svg:height="0.298cm" svg:x="1.535cm" svg:y="17.35cm">
          <draw:text-box>
            <text:p text:style-name="P3"><text:span text:style-name="T5">Item</text:span></text:p>
          </draw:text-box>
        </draw:frame>
        <draw:frame draw:style-name="gr143" draw:text-style-name="P8" draw:layer="layout" svg:width="0.705cm" svg:height="0.298cm" svg:x="9.484cm" svg:y="17.35cm">
          <draw:text-box>
            <text:p text:style-name="P3"><text:span text:style-name="T5">Rating</text:span></text:p>
          </draw:text-box>
        </draw:frame>
        <draw:frame draw:style-name="gr130" draw:text-style-name="P8" draw:layer="layout" svg:width="0.722cm" svg:height="0.298cm" svg:x="1.534cm" svg:y="7.601cm">
          <draw:text-box>
            <text:p text:style-name="P3"><text:span text:style-name="T5">Armor</text:span></text:p>
          </draw:text-box>
        </draw:frame>
        <draw:line draw:style-name="gr15" draw:text-style-name="P2" draw:layer="layout" svg:x1="10.056cm" svg:y1="7.975cm" svg:x2="1.533cm" svg:y2="7.975cm">
          <text:p/>
        </draw:line>
        <draw:frame draw:style-name="gr143" draw:text-style-name="P8" draw:layer="layout" svg:width="0.705cm" svg:height="0.298cm" svg:x="5.509cm" svg:y="7.601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8.387cm" svg:y="7.601cm">
          <draw:text-box>
            <text:p text:style-name="P3"><text:span text:style-name="T5">Notes</text:span></text:p>
          </draw:text-box>
        </draw:frame>
        <draw:frame draw:style-name="gr145" draw:text-style-name="P8" draw:layer="layout" svg:width="1.276cm" svg:height="0.298cm" svg:x="11.712cm" svg:y="8.135cm">
          <draw:text-box>
            <text:p text:style-name="P3"><text:span text:style-name="T5">Devices/DR</text:span></text:p>
          </draw:text-box>
        </draw:frame>
        <draw:line draw:style-name="gr15" draw:text-style-name="P2" draw:layer="layout" svg:x1="20.233cm" svg:y1="7.975cm" svg:x2="11.712cm" svg:y2="7.975cm">
          <text:p/>
        </draw:line>
        <draw:line draw:style-name="gr15" draw:text-style-name="P2" draw:layer="layout" svg:x1="20.233cm" svg:y1="8.432cm" svg:x2="11.712cm" svg:y2="8.432cm">
          <text:p/>
        </draw:line>
        <draw:line draw:style-name="gr15" draw:text-style-name="P2" draw:layer="layout" svg:x1="20.233cm" svg:y1="8.889cm" svg:x2="11.712cm" svg:y2="8.889cm">
          <text:p/>
        </draw:line>
        <draw:line draw:style-name="gr15" draw:text-style-name="P2" draw:layer="layout" svg:x1="20.233cm" svg:y1="9.346cm" svg:x2="11.712cm" svg:y2="9.346cm">
          <text:p/>
        </draw:line>
        <draw:line draw:style-name="gr15" draw:text-style-name="P2" draw:layer="layout" svg:x1="20.233cm" svg:y1="9.803cm" svg:x2="11.712cm" svg:y2="9.803cm">
          <text:p/>
        </draw:line>
        <draw:line draw:style-name="gr15" draw:text-style-name="P2" draw:layer="layout" svg:x1="20.233cm" svg:y1="10.261cm" svg:x2="11.712cm" svg:y2="10.261cm">
          <text:p/>
        </draw:line>
        <draw:line draw:style-name="gr15" draw:text-style-name="P2" draw:layer="layout" svg:x1="14.394cm" svg:y1="10.718cm" svg:x2="11.712cm" svg:y2="10.718cm">
          <text:p/>
        </draw:line>
        <draw:polygon draw:style-name="gr85" draw:text-style-name="P1" draw:layer="layout" svg:width="0.482cm" svg:height="0.556cm" svg:x="14.547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5.026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5.502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5.981cm" svg:y="10.383cm" svg:viewBox="0 0 481 557" draw:points="481,416 481,139 241,0 0,139 0,416 241,557">
          <text:p/>
        </draw:polygon>
        <draw:polygon draw:style-name="gr85" draw:text-style-name="P1" draw:layer="layout" svg:width="0.481cm" svg:height="0.556cm" svg:x="16.458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6.934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7.413cm" svg:y="10.383cm" svg:viewBox="0 0 481 557" draw:points="481,416 481,139 241,0 0,139 0,416 241,557">
          <text:p/>
        </draw:polygon>
        <draw:polygon draw:style-name="gr85" draw:text-style-name="P1" draw:layer="layout" svg:width="0.482cm" svg:height="0.556cm" svg:x="17.889cm" svg:y="10.383cm" svg:viewBox="0 0 483 557" draw:points="483,416 483,139 243,0 0,139 0,416 243,557">
          <text:p/>
        </draw:polygon>
        <draw:polygon draw:style-name="gr85" draw:text-style-name="P1" draw:layer="layout" svg:width="0.482cm" svg:height="0.556cm" svg:x="18.366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8.845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9.321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9.8cm" svg:y="10.383cm" svg:viewBox="0 0 481 557" draw:points="481,416 481,139 241,0 0,139 0,416 241,557">
          <text:p/>
        </draw:polygon>
        <draw:frame draw:style-name="gr146" draw:text-style-name="P8" draw:layer="layout" svg:width="1.103cm" svg:height="0.298cm" svg:x="11.712cm" svg:y="8.579cm">
          <draw:text-box>
            <text:p text:style-name="P3"><text:span text:style-name="T5">Programs</text:span></text:p>
          </draw:text-box>
        </draw:frame>
        <draw:frame draw:style-name="gr147" draw:text-style-name="P8" draw:layer="layout" svg:width="2.716cm" svg:height="0.298cm" svg:x="11.712cm" svg:y="10.408cm">
          <draw:text-box>
            <text:p text:style-name="P3"><text:span text:style-name="T5">Matrix Condition Monitor</text:span></text:p>
          </draw:text-box>
        </draw:frame>
        <draw:frame draw:style-name="gr148" draw:text-style-name="P4" draw:layer="layout" svg:width="0.281cm" svg:height="0.331cm" svg:x="14.734cm" svg:y="10.488cm">
          <draw:text-box>
            <text:p text:style-name="P3"><text:span text:style-name="T19">1</text:span></text:p>
          </draw:text-box>
        </draw:frame>
        <draw:frame draw:style-name="gr148" draw:text-style-name="P4" draw:layer="layout" svg:width="0.281cm" svg:height="0.331cm" svg:x="15.199cm" svg:y="10.488cm">
          <draw:text-box>
            <text:p text:style-name="P3"><text:span text:style-name="T19">2</text:span></text:p>
          </draw:text-box>
        </draw:frame>
        <draw:frame draw:style-name="gr148" draw:text-style-name="P4" draw:layer="layout" svg:width="0.281cm" svg:height="0.331cm" svg:x="15.676cm" svg:y="10.488cm">
          <draw:text-box>
            <text:p text:style-name="P3"><text:span text:style-name="T19">3</text:span></text:p>
          </draw:text-box>
        </draw:frame>
        <draw:frame draw:style-name="gr148" draw:text-style-name="P4" draw:layer="layout" svg:width="0.281cm" svg:height="0.331cm" svg:x="16.142cm" svg:y="10.488cm">
          <draw:text-box>
            <text:p text:style-name="P3"><text:span text:style-name="T19">4</text:span></text:p>
          </draw:text-box>
        </draw:frame>
        <draw:frame draw:style-name="gr148" draw:text-style-name="P4" draw:layer="layout" svg:width="0.281cm" svg:height="0.331cm" svg:x="16.631cm" svg:y="10.488cm">
          <draw:text-box>
            <text:p text:style-name="P3"><text:span text:style-name="T19">5</text:span></text:p>
          </draw:text-box>
        </draw:frame>
        <draw:frame draw:style-name="gr148" draw:text-style-name="P4" draw:layer="layout" svg:width="0.281cm" svg:height="0.331cm" svg:x="17.099cm" svg:y="10.488cm">
          <draw:text-box>
            <text:p text:style-name="P3"><text:span text:style-name="T19">6</text:span></text:p>
          </draw:text-box>
        </draw:frame>
        <draw:frame draw:style-name="gr148" draw:text-style-name="P4" draw:layer="layout" svg:width="0.281cm" svg:height="0.331cm" svg:x="17.586cm" svg:y="10.488cm">
          <draw:text-box>
            <text:p text:style-name="P3"><text:span text:style-name="T19">7</text:span></text:p>
          </draw:text-box>
        </draw:frame>
        <draw:frame draw:style-name="gr148" draw:text-style-name="P4" draw:layer="layout" svg:width="0.281cm" svg:height="0.331cm" svg:x="18.055cm" svg:y="10.488cm">
          <draw:text-box>
            <text:p text:style-name="P3"><text:span text:style-name="T19">8</text:span></text:p>
          </draw:text-box>
        </draw:frame>
        <draw:frame draw:style-name="gr148" draw:text-style-name="P4" draw:layer="layout" svg:width="0.281cm" svg:height="0.331cm" svg:x="18.531cm" svg:y="10.488cm">
          <draw:text-box>
            <text:p text:style-name="P3"><text:span text:style-name="T19">9</text:span></text:p>
          </draw:text-box>
        </draw:frame>
        <draw:polygon draw:style-name="gr1" draw:text-style-name="P1" draw:layer="layout" svg:width="0.381cm" svg:height="0.382cm" svg:x="14.581cm" svg:y="10.471cm" svg:viewBox="0 0 382 383" draw:points="0,383 382,383 382,0 0,0">
          <text:p/>
        </draw:polygon>
        <draw:polygon draw:style-name="gr101" draw:text-style-name="P2" draw:layer="layout" svg:width="0.346cm" svg:height="0.347cm" svg:x="14.599cm" svg:y="10.489cm" svg:viewBox="0 0 347 348" draw:points="0,348 347,348 347,0 0,0">
          <text:p/>
        </draw:polygon>
        <draw:polygon draw:style-name="gr1" draw:text-style-name="P1" draw:layer="layout" svg:width="0.381cm" svg:height="0.382cm" svg:x="15.061cm" svg:y="10.471cm" svg:viewBox="0 0 382 383" draw:points="0,383 382,383 382,0 0,0">
          <text:p/>
        </draw:polygon>
        <draw:polygon draw:style-name="gr101" draw:text-style-name="P2" draw:layer="layout" svg:width="0.346cm" svg:height="0.347cm" svg:x="15.078cm" svg:y="10.489cm" svg:viewBox="0 0 347 348" draw:points="0,348 347,348 347,0 0,0">
          <text:p/>
        </draw:polygon>
        <draw:polygon draw:style-name="gr1" draw:text-style-name="P1" draw:layer="layout" svg:width="0.381cm" svg:height="0.382cm" svg:x="15.54cm" svg:y="10.471cm" svg:viewBox="0 0 382 383" draw:points="0,383 382,383 382,0 0,0">
          <text:p/>
        </draw:polygon>
        <draw:polygon draw:style-name="gr101" draw:text-style-name="P2" draw:layer="layout" svg:width="0.346cm" svg:height="0.347cm" svg:x="15.557cm" svg:y="10.489cm" svg:viewBox="0 0 347 348" draw:points="0,348 347,348 347,0 0,0">
          <text:p/>
        </draw:polygon>
        <draw:polygon draw:style-name="gr1" draw:text-style-name="P1" draw:layer="layout" svg:width="0.381cm" svg:height="0.382cm" svg:x="16.019cm" svg:y="10.471cm" svg:viewBox="0 0 382 383" draw:points="0,383 382,383 382,0 0,0">
          <text:p/>
        </draw:polygon>
        <draw:polygon draw:style-name="gr101" draw:text-style-name="P2" draw:layer="layout" svg:width="0.346cm" svg:height="0.347cm" svg:x="16.036cm" svg:y="10.489cm" svg:viewBox="0 0 347 348" draw:points="0,348 347,348 347,0 0,0">
          <text:p/>
        </draw:polygon>
        <draw:polygon draw:style-name="gr1" draw:text-style-name="P1" draw:layer="layout" svg:width="0.381cm" svg:height="0.382cm" svg:x="16.498cm" svg:y="10.471cm" svg:viewBox="0 0 382 383" draw:points="0,383 382,383 382,0 0,0">
          <text:p/>
        </draw:polygon>
        <draw:polygon draw:style-name="gr101" draw:text-style-name="P2" draw:layer="layout" svg:width="0.347cm" svg:height="0.347cm" svg:x="16.515cm" svg:y="10.489cm" svg:viewBox="0 0 348 348" draw:points="0,348 348,348 348,0 0,0">
          <text:p/>
        </draw:polygon>
        <draw:polygon draw:style-name="gr1" draw:text-style-name="P1" draw:layer="layout" svg:width="0.381cm" svg:height="0.382cm" svg:x="16.977cm" svg:y="10.471cm" svg:viewBox="0 0 382 383" draw:points="0,383 382,383 382,0 0,0">
          <text:p/>
        </draw:polygon>
        <draw:polygon draw:style-name="gr101" draw:text-style-name="P2" draw:layer="layout" svg:width="0.347cm" svg:height="0.347cm" svg:x="16.994cm" svg:y="10.489cm" svg:viewBox="0 0 348 348" draw:points="0,348 348,348 348,0 0,0">
          <text:p/>
        </draw:polygon>
        <draw:polygon draw:style-name="gr1" draw:text-style-name="P1" draw:layer="layout" svg:width="0.381cm" svg:height="0.382cm" svg:x="17.456cm" svg:y="10.471cm" svg:viewBox="0 0 382 383" draw:points="0,383 382,383 382,0 0,0">
          <text:p/>
        </draw:polygon>
        <draw:polygon draw:style-name="gr101" draw:text-style-name="P2" draw:layer="layout" svg:width="0.346cm" svg:height="0.347cm" svg:x="17.474cm" svg:y="10.489cm" svg:viewBox="0 0 347 348" draw:points="0,348 347,348 347,0 0,0">
          <text:p/>
        </draw:polygon>
        <draw:polygon draw:style-name="gr1" draw:text-style-name="P1" draw:layer="layout" svg:width="0.381cm" svg:height="0.382cm" svg:x="17.935cm" svg:y="10.471cm" svg:viewBox="0 0 382 383" draw:points="0,383 382,383 382,0 0,0">
          <text:p/>
        </draw:polygon>
        <draw:polygon draw:style-name="gr101" draw:text-style-name="P2" draw:layer="layout" svg:width="0.346cm" svg:height="0.347cm" svg:x="17.953cm" svg:y="10.489cm" svg:viewBox="0 0 347 348" draw:points="0,348 347,348 347,0 0,0">
          <text:p/>
        </draw:polygon>
        <draw:polygon draw:style-name="gr1" draw:text-style-name="P1" draw:layer="layout" svg:width="0.38cm" svg:height="0.382cm" svg:x="18.415cm" svg:y="10.471cm" svg:viewBox="0 0 381 383" draw:points="0,383 381,383 381,0 0,0">
          <text:p/>
        </draw:polygon>
        <draw:polygon draw:style-name="gr101" draw:text-style-name="P2" draw:layer="layout" svg:width="0.346cm" svg:height="0.347cm" svg:x="18.432cm" svg:y="10.489cm" svg:viewBox="0 0 347 348" draw:points="0,348 347,348 347,0 0,0">
          <text:p/>
        </draw:polygon>
        <draw:polygon draw:style-name="gr1" draw:text-style-name="P1" draw:layer="layout" svg:width="0.381cm" svg:height="0.382cm" svg:x="18.894cm" svg:y="10.471cm" svg:viewBox="0 0 382 383" draw:points="0,383 382,383 382,0 0,0">
          <text:p/>
        </draw:polygon>
        <draw:polygon draw:style-name="gr101" draw:text-style-name="P2" draw:layer="layout" svg:width="0.346cm" svg:height="0.347cm" svg:x="18.911cm" svg:y="10.489cm" svg:viewBox="0 0 347 348" draw:points="0,348 347,348 347,0 0,0">
          <text:p/>
        </draw:polygon>
        <draw:polygon draw:style-name="gr1" draw:text-style-name="P1" draw:layer="layout" svg:width="0.381cm" svg:height="0.382cm" svg:x="19.373cm" svg:y="10.471cm" svg:viewBox="0 0 382 383" draw:points="0,383 382,383 382,0 0,0">
          <text:p/>
        </draw:polygon>
        <draw:polygon draw:style-name="gr101" draw:text-style-name="P2" draw:layer="layout" svg:width="0.346cm" svg:height="0.347cm" svg:x="19.39cm" svg:y="10.489cm" svg:viewBox="0 0 347 348" draw:points="0,348 347,348 347,0 0,0">
          <text:p/>
        </draw:polygon>
        <draw:polygon draw:style-name="gr1" draw:text-style-name="P1" draw:layer="layout" svg:width="0.381cm" svg:height="0.382cm" svg:x="19.852cm" svg:y="10.471cm" svg:viewBox="0 0 382 383" draw:points="0,383 382,383 382,0 0,0">
          <text:p/>
        </draw:polygon>
        <draw:polygon draw:style-name="gr101" draw:text-style-name="P2" draw:layer="layout" svg:width="0.347cm" svg:height="0.347cm" svg:x="19.869cm" svg:y="10.489cm" svg:viewBox="0 0 348 348" draw:points="0,348 348,348 348,0 0,0">
          <text:p/>
        </draw:polygon>
        <draw:frame draw:style-name="gr149" draw:text-style-name="P4" draw:layer="layout" svg:width="1.272cm" svg:height="0.331cm" svg:x="18.951cm" svg:y="10.488cm">
          <draw:text-box>
            <text:p text:style-name="P3"><text:span text:style-name="T19">10 11 12</text:span></text:p>
          </draw:text-box>
        </draw:frame>
        <draw:frame draw:style-name="gr150" draw:text-style-name="P8" draw:layer="layout" svg:width="0.624cm" svg:height="0.298cm" svg:x="15.932cm" svg:y="14.436cm">
          <draw:text-box>
            <text:p text:style-name="P3"><text:span text:style-name="T5">Seats</text:span></text:p>
          </draw:text-box>
        </draw:frame>
        <draw:frame draw:style-name="gr91" draw:text-style-name="P4" draw:layer="layout" svg:width="0.281cm" svg:height="0.319cm" svg:x="16.549cm" svg:y="13.45cm">
          <draw:text-box>
            <text:p text:style-name="P3"><text:span text:style-name="T12">3</text:span></text:p>
          </draw:text-box>
        </draw:frame>
        <draw:frame draw:style-name="gr151" draw:text-style-name="P21" draw:layer="layout" svg:width="9.25cm" svg:height="2.201cm" svg:x="0.75cm" svg:y="4.559cm">
          <draw:text-box>
            <text:p><text:span text:style-name="T20">Арес Предатор</text:span><text:span text:style-name="T20"><text:tab/></text:span><text:span text:style-name="T20">2(Л)</text:span><text:span text:style-name="T20"><text:tab/></text:span><text:span text:style-name="T20"><text:tab/></text:span><text:span text:style-name="T20">см прил. 1</text:span><text:span text:style-name="T20"><text:tab/></text:span><text:span text:style-name="T20"><text:tab/></text:span><text:span text:style-name="T20">750</text:span></text:p>
            <text:p><text:span text:style-name="T20">Без гильз</text:span><text:span text:style-name="T20"><text:tab/></text:span><text:span text:style-name="T20">Об (2 х <text:s/>15)</text:span><text:span text:style-name="T20"><text:tab/></text:span><text:span text:style-name="T20"><text:tab/></text:span><text:span text:style-name="T20"><text:tab/></text:span><text:span text:style-name="T20"><text:tab/></text:span><text:span text:style-name="T20">70</text:span><text:span text:style-name="T20"><text:tab/></text:span></text:p>
            <text:p><text:span text:style-name="T20">PJSS модель 55</text:span><text:span text:style-name="T20"><text:tab/></text:span><text:span text:style-name="T20">5 (Л)</text:span><text:span text:style-name="T20"><text:tab/></text:span><text:span text:style-name="T20"><text:tab/></text:span><text:span text:style-name="T20">см прил. 2</text:span><text:span text:style-name="T20"><text:tab/></text:span><text:span text:style-name="T20"><text:tab/></text:span><text:span text:style-name="T20">825</text:span></text:p>
            <text:p><text:span text:style-name="T20">Без гильз</text:span><text:span text:style-name="T20"><text:tab/></text:span><text:span text:style-name="T20">ПБОБ 1х10</text:span><text:span text:style-name="T20"><text:tab/></text:span><text:span text:style-name="T20">ВЗР 1х10</text:span><text:span text:style-name="T20"><text:tab/></text:span><text:span text:style-name="T20">Об 2х10</text:span><text:span text:style-name="T20"><text:tab/></text:span><text:span text:style-name="T20"><text:tab/></text:span><text:span text:style-name="T20">165</text:span></text:p>
            <text:p><text:span text:style-name="T20">Ремингтон 900</text:span><text:span text:style-name="T20"><text:tab/></text:span><text:span text:style-name="T20">3 (Л)</text:span><text:span text:style-name="T20"><text:tab/></text:span><text:span text:style-name="T20"><text:tab/></text:span><text:span text:style-name="T20">см прил. 3</text:span><text:span text:style-name="T20"><text:tab/></text:span><text:span text:style-name="T20"><text:tab/></text:span><text:span text:style-name="T20">12000</text:span></text:p>
            <text:p><text:span text:style-name="T20">Без гильз</text:span><text:span text:style-name="T20"><text:tab/></text:span><text:span text:style-name="T20">ПБОБ 2х5</text:span><text:span text:style-name="T20"><text:tab/></text:span><text:span text:style-name="T20">Об 5х5</text:span><text:span text:style-name="T20"><text:tab/></text:span><text:span text:style-name="T20">ЛЦУ 125 (+1 к АТК)</text:span><text:span text:style-name="T20"><text:tab/></text:span><text:span text:style-name="T20"><text:tab/></text:span><text:span text:style-name="T20">155</text:span></text:p>
            <text:p><text:span text:style-name="T20">2 оглуш гранаты</text:span><text:span text:style-name="T20"><text:tab/></text:span><text:span text:style-name="T20">4 (л)</text:span><text:span text:style-name="T20"><text:tab/></text:span><text:span text:style-name="T20"><text:tab/></text:span><text:span text:style-name="T20">См прил 4</text:span><text:span text:style-name="T20"><text:tab/></text:span><text:span text:style-name="T20"><text:tab/></text:span><text:span text:style-name="T20">200</text:span></text:p>
            <text:p><text:span text:style-name="T20">Арес лайф фаер </text:span><text:span text:style-name="T20"><text:tab/></text:span><text:span text:style-name="T20"><text:tab/></text:span><text:span text:style-name="T20">30 патронов</text:span><text:span text:style-name="T20"><text:tab/></text:span><text:span text:style-name="T20"><text:tab/></text:span><text:span text:style-name="T20">2 физ 10/7/6/-/-</text:span></text:p>
          </draw:text-box>
        </draw:frame>
        <draw:frame draw:style-name="gr152" draw:text-style-name="P22" draw:layer="layout" svg:width="9.336cm" svg:height="0.441cm" svg:x="11.5cm" svg:y="4.5cm">
          <draw:text-box>
            <text:p><text:span text:style-name="T21">Боевой топор</text:span><text:span text:style-name="T21"><text:tab/></text:span><text:span text:style-name="T21">4</text:span><text:span text:style-name="T21"><text:tab/></text:span><text:span text:style-name="T21"><text:tab/></text:span><text:span text:style-name="T21">5Ф, АТК 9/(0)</text:span><text:span text:style-name="T21"><text:tab/></text:span><text:span text:style-name="T21"><text:tab/></text:span><text:span text:style-name="T21">550</text:span></text:p>
          </draw:text-box>
        </draw:frame>
        <draw:frame draw:style-name="gr153" draw:text-style-name="P16" draw:layer="layout" svg:width="8.463cm" svg:height="0.399cm" svg:x="1.287cm" svg:y="8.25cm">
          <draw:text-box>
            <text:p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 <text:s text:c="6"/>8 объём</text:span><text:span text:style-name="T16"><text:tab/></text:span><text:span text:style-name="T16">1000</text:span></text:p>
          </draw:text-box>
        </draw:frame>
        <draw:frame draw:style-name="gr154" draw:text-style-name="P16" draw:layer="layout" svg:width="9.5cm" svg:height="2.335cm" svg:x="1cm" svg:y="13cm">
          <draw:text-box>
            <text:p><text:span text:style-name="T16">Замена мускулов</text:span><text:span text:style-name="T16"><text:tab/></text:span><text:span text:style-name="T16">2 +2 к Силе и Проворству</text:span><text:span text:style-name="T16"><text:tab/></text:span><text:span text:style-name="T16"> 60000</text:span></text:p>
            <text:p><text:span text:style-name="T16">Модуль контроля</text:span><text:span text:style-name="T16"><text:tab/></text:span><text:span text:style-name="T16">2 - 2 к сложности вождения +2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 <text:s text:c="8"/></text:span><text:span text:style-name="T16"><text:tab/></text:span><text:span text:style-name="T16"><text:tab/></text:span><text:span text:style-name="T16">60000</text:span></text:p>
          </draw:text-box>
        </draw:frame>
        <draw:frame draw:style-name="gr155" draw:text-style-name="P23" draw:layer="layout" svg:width="7.141cm" svg:height="0.399cm" svg:x="12.859cm" svg:y="12.5cm">
          <draw:text-box>
            <text:p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56" draw:text-style-name="P23" draw:layer="layout" svg:width="4.463cm" svg:height="0.399cm" svg:x="12.75cm" svg:y="14.75cm">
          <draw:text-box>
            <text:p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4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5" draw:text-style-name="P16" draw:layer="layout" svg:width="3.241cm" svg:height="0.399cm" svg:x="14.984cm" svg:y="0.851cm">
          <draw:text-box>
            <text:p><text:span text:style-name="T16">Такода Часка (Боров)</text:span></text:p>
          </draw:text-box>
        </draw:frame>
        <draw:frame draw:style-name="gr157" draw:text-style-name="P17" draw:layer="layout" svg:width="0.75cm" svg:height="0.314cm" svg:x="9.25cm" svg:y="4.5cm">
          <draw:text-box>
            <text:p><text:span text:style-name="T17">3 физ</text:span></text:p>
          </draw:text-box>
        </draw:frame>
        <draw:frame draw:style-name="gr157" draw:text-style-name="P17" draw:layer="layout" svg:width="0.75cm" svg:height="0.314cm" svg:x="9.25cm" svg:y="5cm">
          <draw:text-box>
            <text:p><text:span text:style-name="T17">4 физ</text:span></text:p>
          </draw:text-box>
        </draw:frame>
        <draw:frame draw:style-name="gr157" draw:text-style-name="P17" draw:layer="layout" svg:width="0.75cm" svg:height="0.314cm" svg:x="9.25cm" svg:y="5.5cm">
          <draw:text-box>
            <text:p><text:span text:style-name="T17">5 физ</text:span></text:p>
          </draw:text-box>
        </draw:frame>
        <draw:frame draw:style-name="gr157" draw:text-style-name="P17" draw:layer="layout" svg:width="1.25cm" svg:height="0.314cm" svg:x="8.95cm" svg:y="4.75cm">
          <draw:text-box>
            <text:p><text:span text:style-name="T17">10/10/8/-/-</text:span></text:p>
          </draw:text-box>
        </draw:frame>
        <draw:frame draw:style-name="gr158" draw:text-style-name="P17" draw:layer="layout" svg:width="1.5cm" svg:height="0.464cm" svg:x="8.95cm" svg:y="5.286cm">
          <draw:text-box>
            <text:p><text:span text:style-name="T17">3/12/8/-/-</text:span></text:p>
          </draw:text-box>
        </draw:frame>
        <draw:frame draw:style-name="gr157" draw:text-style-name="P17" draw:layer="layout" svg:width="1.75cm" svg:height="0.314cm" svg:x="9cm" svg:y="5.75cm">
          <draw:text-box>
            <text:p><text:span text:style-name="T17">2/7/10/12/21</text:span></text:p>
          </draw:text-box>
        </draw:frame>
      </draw:page>
      <draw:page draw:name="page3" draw:style-name="dp1" draw:master-page-name="master-page3">
        <draw:frame draw:style-name="gr2" draw:text-style-name="P19" draw:layer="layout" svg:width="22.265cm" svg:height="27.625cm" svg:x="-0.317cm" svg:y="-0.318cm">
          <draw:image xlink:href="Pictures/1000000000000A4600000CBF6B973AD3.jpg" xlink:type="simple" xlink:show="embed" xlink:actuate="onLoad" draw:mime-type="image/jpeg">
            <text:p/>
          </draw:image>
        </draw:frame>
        <draw:path draw:style-name="gr7" draw:text-style-name="P2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text-style-name="P2" draw:layer="layout" svg:width="12.517cm" svg:height="2.863cm" svg:x="0.424cm" svg:y="0.231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6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8" draw:text-style-name="P6" draw:layer="layout" svg:width="0.253cm" svg:height="0.361cm" svg:x="12.078cm" svg:y="0.788cm">
          <draw:text-box>
            <text:p text:style-name="P3"><text:span text:style-name="T3">®</text:span></text:p>
          </draw:text-box>
        </draw:frame>
        <draw:frame draw:style-name="gr159" draw:text-style-name="P24" draw:layer="layout" svg:width="10.48cm" svg:height="12.376cm" svg:x="0.25cm" svg:y="10.75cm">
          <draw:text-box>
            <text:p><text:span text:style-name="T22">1) Родился в небогатой семье, проживающей в одной из резерваций нативных племён. С детства хоть и</text:span></text:p>
            <text:p><text:span text:style-name="T22">Был открытым для общения, но предпочитал держаться обособленно и сторонился каких-то стихийных «банд».</text:span></text:p>
            <text:p><text:span text:style-name="T22"/></text:p>
            <text:p><text:span text:style-name="T22">2) Ещё со школьной скамьи Такода проявлял активный интерес к колёсному транспорту. Начиналось всё с</text:span></text:p>
            <text:p><text:span text:style-name="T22">Отцовского ржавого корыта, которым Такода периодически рулил и иногда ремонтировал. Постепенно по цепи</text:span></text:p>
            <text:p><text:span text:style-name="T22">знакомств его привлекали к кустарным гоночным соревнованиям. Форматы были самые разные — от уличных</text:span></text:p>
            <text:p><text:span text:style-name="T22">Гонок до раллийных марафонов и даже до дерби разрушения для списанных ржавых корыт со свалки.. </text:span></text:p>
            <text:p><text:span text:style-name="T22">Деньги с выигрышей (а призы он получал довольно часто) уходили как на </text:span></text:p>
            <text:p><text:span text:style-name="T22">Помощь семье, так и на апгрейды/закупку гоночных болидов. Одно из таких соревнований засветилось в сети,</text:span></text:p>
            <text:p><text:span text:style-name="T22">после чего ему после некоторого общения с доселе незнакомыми людьми </text:span></text:p>
            <text:p><text:span text:style-name="T22">пришло очень заманчивое предложение — пройти доп обучение на права категории </text:span></text:p>
            <text:p><text:span text:style-name="T22">коммерческих Т.С. И устроиться водителем-дальнобойщиком в транспортную корпорацию-подрядчик.</text:span></text:p>
            <text:p><text:span text:style-name="T22"/></text:p>
            <text:p><text:span text:style-name="T22">3) Работа в корпе была хоть и стабильной, но не приносила такого азарта, и потому на предложение связаться с</text:span></text:p>
            <text:p><text:span text:style-name="T22">подпольной нелегальщиной корпорации Такода ответил с большой охотой. Привлекали его по разным делам.</text:span></text:p>
            <text:p><text:span text:style-name="T22">То провоз контрабанды, то помощь в сокрытии разыскиваемых личностей... </text:span><text:span text:style-name="T22"><text:line-break/></text:span><text:span text:style-name="T22">Большой процент нелегально перевозимого составляло оружие. Поначалу Такода лишь крутил баранку,</text:span></text:p>
            <text:p><text:span text:style-name="T22"><text:s/></text:span><text:span text:style-name="T22">однако то здесь просили подсобить с «отмывкой» и снятием ярлыков, то там за небольшую долю предлагали </text:span><text:span text:style-name="T22"><text:line-break/></text:span><text:span text:style-name="T22">подшаманить модификации... всё больше и больше кустарного ремонта проходило через его руки.</text:span></text:p>
            <text:p><text:span text:style-name="T22">И ремонта неплохого. В сжатые сроки. Что не осталось незамеченным перед основными воротилами </text:span></text:p>
            <text:p><text:span text:style-name="T22">оружейного бизнеса. Особенно отразился на его репутации случай, когда он в паре с другим технарём </text:span><text:span text:style-name="T22"><text:line-break/></text:span><text:span text:style-name="T22">полноценно подготовил к продаже огромную партию «товара». </text:span><text:span text:style-name="T22"><text:line-break/></text:span><text:span text:style-name="T22">После этого его постепенно и внедрили как полноценного оружейника.</text:span></text:p>
            <text:p><text:span text:style-name="T22"/></text:p>
            <text:p><text:span text:style-name="T22">4) Однако нелегальные дела не остаются без последствий. </text:span></text:p>
            <text:p><text:span text:style-name="T22">Всё больее внимание властей, постоянная нервотрёпка,</text:span></text:p>
            <text:p><text:span text:style-name="T22">Бывшие коллеги один за другим начинали <text:s/>проворачивать грязные дела за его спиной. </text:span></text:p>
            <text:p><text:span text:style-name="T22">Хоть руководство и пыталось разрешить подобные конфликты, всё же сотрудник весьма ценный.</text:span></text:p>
            <text:p><text:span text:style-name="T22">На вклад в общий товарооборот ему даже помогли с установкой РПУ, что должно было </text:span></text:p>
            <text:p><text:span text:style-name="T22">ещё больше облегчить работу.</text:span></text:p>
            <text:p><text:span text:style-name="T22"><text:s/></text:span></text:p>
            <text:p><text:span text:style-name="T22">Но не смотря на всё это, Такода всё больше полагался только на себя и </text:span></text:p>
            <text:p><text:span text:style-name="T22">свой верный «ремингтон», который он больше не отпускал от себя дальше метра. </text:span></text:p>
            <text:p><text:span text:style-name="T22"/></text:p>
            <text:p><text:span text:style-name="T22">5) В какой-то момент чаша терпения переполнилась. Сами посудите, готовы ли вы вот просто так взять </text:span></text:p>
            <text:p><text:span text:style-name="T22">и устроить терракт под прикрытием техногенной катастрофы? </text:span></text:p>
            <text:p><text:span text:style-name="T22">Да ещё и зная по слухам, что ваш «заказ» станет отправной</text:span></text:p>
            <text:p><text:span text:style-name="T22">точкой для постепенного устранения целого поселения... в котором проживают ваши соплеменники?</text:span></text:p>
            <text:p><text:span text:style-name="T22"/></text:p>
            <text:p><text:span text:style-name="T22">Нет. Слишком дорогая сделка с совестью. Да только неповиновение обходится порой дороже. </text:span></text:p>
            <text:p><text:span text:style-name="T22">Практически сразу вся милость и покровение сверху улетучилась. </text:span><text:span text:style-name="T22"><text:line-break/></text:span><text:span text:style-name="T22">Из нелегального бизнеса можно выйти только вперёд ногами, и похоже что ровно этот путь ему и готовили, </text:span><text:span text:style-name="T22"><text:line-break/></text:span><text:span text:style-name="T22">ведь зачем вам винтик, на который нельзя положиться?</text:span><text:span text:style-name="T22"><text:line-break/></text:span><text:span text:style-name="T22"/></text:p>
            <text:p><text:span text:style-name="T22">Скрываясь от преследования бывших нанимателей, Такоде пришлось обзавестись новой</text:span></text:p>
            <text:p><text:span text:style-name="T22"><text:s/></text:span><text:span text:style-name="T22">личностью, новым местом жительства, новым транспортом... и новой жизнью. Жизнью бегущего.</text:span><text:span text:style-name="T22"><text:line-break/></text:span><text:span text:style-name="T22"/></text:p>
          </draw:text-box>
        </draw:frame>
        <draw:path draw:style-name="gr7" draw:text-style-name="P2" draw:layer="layout" svg:width="10.816cm" svg:height="5.749cm" svg:x="-0.317cm" svg:y="3.25cm" svg:viewBox="0 0 10817 5750" svg:d="M0 0v5750h10393c0 0 424 0 424-264v-5222c0 0 0-264-424-264z">
          <text:p/>
        </draw:path>
        <draw:frame draw:style-name="gr160" draw:text-style-name="P17" draw:layer="layout" svg:width="9.25cm" svg:height="3.75cm" svg:x="0.25cm" svg:y="4.25cm">
          <draw:text-box>
            <text:p><text:span text:style-name="T17">Грех 1: Дальнобой Узумети Колберт, коренной американец. Среднее техническое образование, средний уровень проживания. Работает в фиктивной транспортной корпе-подрядчике. Лицензия на хранение и перевозку оружия, есть небольшой список штрафов по части воздения.</text:span><text:span text:style-name="T17"><text:line-break/></text:span><text:span text:style-name="T17"><text:line-break/></text:span><text:span text:style-name="T17">Грех 2: Инженер Эйрики Шайерн, коренной американец. Работник и закупщик запчастей небольшого сервиса для модульного ремонта авто- и мото- техники, включая крупный грузовой транспорт. Так же владелец частной оружейной мастерской с лицензией на модульный ремонт и модификацию оружия. Среднее техническое образование, средний уровень проживания</text:span></text:p>
          </draw:text-box>
        </draw:frame>
        <draw:path draw:style-name="gr7" draw:text-style-name="P2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6" draw:text-style-name="P7" draw:layer="layout" svg:width="1.623cm" svg:height="0.53cm" svg:x="0.127cm" svg:y="3.47cm">
          <draw:text-box>
            <text:p><text:span text:style-name="T23">Sins:</text:span></text:p>
          </draw:text-box>
        </draw:frame>
        <draw:frame draw:style-name="gr161" draw:text-style-name="P23" draw:layer="layout" svg:width="2.188cm" svg:height="0.5cm" svg:x="0.062cm" svg:y="10cm">
          <draw:text-box>
            <text:p><text:span text:style-name="T23">Backstory:</text:span></text:p>
          </draw:text-box>
        </draw:frame>
        <draw:frame draw:style-name="gr116" draw:text-style-name="P7" draw:layer="layout" svg:width="1.623cm" svg:height="0.53cm" svg:x="11.627cm" svg:y="3.47cm">
          <draw:text-box>
            <text:p><text:span text:style-name="T24">Notes: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4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5" draw:text-style-name="P16" draw:layer="layout" svg:width="3.241cm" svg:height="0.399cm" svg:x="14.984cm" svg:y="0.851cm">
          <draw:text-box>
            <text:p><text:span text:style-name="T16">Такода Часка (Боров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Bahnschrift" svg:font-family="Bahnschrift"/>
    <style:font-face style:name="Bahnschrift1" svg:font-family="Bahnschrift" style:font-pitch="variable"/>
    <style:font-face style:name="DejaVu Sans" svg:font-family="'DejaVu Sans'"/>
    <style:font-face style:name="DejaVu Sans1" svg:font-family="'DejaVu Sans'" style:font-pitch="variable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13H9M41S</meta:editing-duration>
    <meta:editing-cycles>95</meta:editing-cycles>
    <meta:generator>LibreOffice/7.6.4.1$Windows_X86_64 LibreOffice_project/e19e193f88cd6c0525a17fb7a176ed8e6a3e2aa1</meta:generator>
    <meta:creation-date>2026-03-20T12:12:21.36</meta:creation-date>
    <dc:date>2026-06-21T12:28:07.760000000</dc:date>
    <meta:print-date>2026-03-28T12:36:51.198000000</meta:print-date>
    <meta:printed-by>Файлы PDF</meta:printed-by>
    <meta:document-statistic meta:object-count="556"/>
  </office:meta>
</office:document-meta>
</file>